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jpg" manifest:media-type=""/>
  <manifest:file-entry manifest:full-path="Pictures/image5.png" manifest:media-type=""/>
  <manifest:file-entry manifest:full-path="Pictures/image6.jpg" manifest:media-type=""/>
  <manifest:file-entry manifest:full-path="Pictures/image7.png" manifest:media-type=""/>
  <manifest:file-entry manifest:full-path="Pictures/image8.png" manifest:media-type=""/>
  <manifest:file-entry manifest:full-path="Pictures/image9.png" manifest:media-type=""/>
  <manifest:file-entry manifest:full-path="Pictures/image10.jpg" manifest:media-type=""/>
  <manifest:file-entry manifest:full-path="Pictures/image11.png" manifest:media-type=""/>
  <manifest:file-entry manifest:full-path="Pictures/image12.jpg" manifest:media-type=""/>
  <manifest:file-entry manifest:full-path="Pictures/image13.png" manifest:media-type=""/>
  <manifest:file-entry manifest:full-path="Pictures/image14.png" manifest:media-type=""/>
  <manifest:file-entry manifest:full-path="Pictures/image15.png" manifest:media-type=""/>
  <manifest:file-entry manifest:full-path="Pictures/image16.png" manifest:media-type=""/>
  <manifest:file-entry manifest:full-path="Pictures/image17.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presentation"/>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scripts/>
  <office:font-face-decls/>
  <office:automatic-styles>
    <style:style style:family="drawing-page" style:name="dp5">
      <style:drawing-page-properties draw:fill-color="#FFFFFF" draw:fill="solid"/>
    </style:style>
    <style:style style:family="presentation" style:name="pr5">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6">
      <style:paragraph-properties/>
      <style:text-properties/>
    </style:style>
    <style:style style:family="paragraph" style:name="P17">
      <style:paragraph-properties fo:line-height="90%" fo:text-align="left" fo:margin-left="0pt" fo:margin-right="0pt" fo:text-indent="0pt" fo:margin-top="0pt" fo:margin-bottom="0pt"/>
      <style:text-properties/>
    </style:style>
    <style:style style:family="text" style:name="T1">
      <style:text-properties fo:text-transform="uppercase" fo:color="#043962" fo:font-family="Arial Black" style:font-family-complex="Arial Black" fo:font-size="24pt" style:font-size-asian="24pt" style:font-size-complex="24pt" fo:letter-spacing="0pt" fo:language="fr" fo:country="FR" style:text-underline-type="none" fo:font-weight="bold"/>
    </style:style>
    <style:style style:family="presentation" style:name="pr6">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8">
      <style:paragraph-properties/>
      <style:text-properties/>
    </style:style>
    <style:style style:family="paragraph" style:name="P19">
      <style:paragraph-properties/>
      <style:text-properties/>
    </style:style>
    <style:style style:family="text" style:name="T2">
      <style:text-properties fo:color="#000000" style:text-line-through-type="none" fo:font-family="Arial" style:font-family-complex="Arial" fo:font-size="14pt" style:font-size-asian="14pt" style:font-size-complex="14pt" fo:letter-spacing="0pt" fo:language="fr" fo:country="FR" style:text-underline-type="single" style:text-underline-style="solid" fo:font-weight="bold"/>
    </style:style>
    <style:style style:family="text" style:name="T3">
      <style:text-properties fo:color="#000000" style:text-line-through-type="none" fo:font-family="Arial" style:font-family-complex="Arial" fo:font-size="14pt" style:font-size-asian="14pt" style:font-size-complex="14pt" fo:letter-spacing="0pt" fo:language="fr" fo:country="FR" style:text-underline-type="none"/>
    </style:style>
    <style:style style:family="graphic" style:name="gr4">
      <style:graphic-properties draw:fill="none" draw:auto-grow-height="false" draw:auto-grow-width="false" draw:stroke="solid" svg:stroke-color="#E6E6E9" svg:stroke-width="0.05291cm" style:wrap="run-through"/>
    </style:style>
    <style:style style:family="paragraph" style:name="P20">
      <style:paragraph-properties/>
      <style:text-properties/>
    </style:style>
    <style:style style:family="graphic" style:name="gr5">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21">
      <style:paragraph-properties fo:text-align="left"/>
      <style:text-properties/>
    </style:style>
    <style:style style:family="text" style:name="T4">
      <style:text-properties fo:color="#FFFFFF" style:text-line-through-type="none" fo:font-size="6pt" style:font-size-asian="6pt" style:font-size-complex="6pt" fo:language="fr" fo:country="FR" fo:font-style="italic" style:text-underline-type="none"/>
    </style:style>
    <style:style style:parent-style-name="Graphics" style:family="graphic" style:name="gr6">
      <style:graphic-properties style:repeat="stretch" style:wrap="run-through" fo:background-color="transparent"/>
    </style:style>
    <style:style style:family="graphic" style:name="gr7">
      <style:graphic-properties draw:fill="none" draw:textarea-vertical-align="middle" draw:auto-grow-height="false" draw:auto-grow-width="false" draw:stroke="none" style:wrap="run-through" fo:padding-top="3.6pt" fo:padding-bottom="3.6pt" fo:padding-left="7.2pt" fo:padding-right="7.2pt" fo:background-color="transparent"/>
    </style:style>
    <style:style style:family="paragraph" style:name="P22">
      <style:paragraph-properties fo:line-height="90%" fo:text-align="center" fo:margin-left="0pt" fo:margin-right="0pt" fo:text-indent="0pt" fo:margin-top="0pt" fo:margin-bottom="0pt"/>
      <style:text-properties/>
    </style:style>
    <style:style style:family="text" style:name="T5">
      <style:text-properties fo:text-transform="uppercase" fo:color="#1575A1" fo:font-family="Arial Black" style:font-family-complex="Arial Black" fo:font-size="12pt" style:font-size-asian="12pt" style:font-size-complex="12pt" fo:letter-spacing="1.47pt" fo:language="fr" fo:country="FR" style:text-underline-type="none" fo:font-weight="bold"/>
    </style:style>
    <style:style style:family="paragraph" style:name="P23">
      <style:paragraph-properties fo:line-height="90%" fo:text-align="center" fo:margin-left="0pt" fo:margin-right="0pt" fo:text-indent="0pt" fo:margin-top="0pt" fo:margin-bottom="0pt"/>
      <style:text-properties/>
    </style:style>
    <style:style style:family="text" style:name="T6">
      <style:text-properties fo:text-transform="uppercase" fo:color="#1575A1" style:text-line-through-type="none" fo:font-family="Arial Black" style:font-family-complex="Arial Black" fo:font-size="9pt" style:font-size-asian="9pt" style:font-size-complex="9pt" fo:letter-spacing="1.46pt" fo:language="fr" fo:country="FR" style:text-underline-type="none" fo:font-weight="bold"/>
    </style:style>
    <style:style style:family="graphic" style:name="gr8">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4">
      <style:paragraph-properties/>
      <style:text-properties/>
    </style:style>
    <style:style style:family="text" style:name="T7">
      <style:text-properties fo:color="#063C67" style:text-line-through-type="none" fo:font-family="Calibri" style:font-family-complex="Calibri" fo:font-size="8pt" style:font-size-asian="8pt" style:font-size-complex="8pt" fo:letter-spacing="0pt" fo:language="en" fo:country="US" style:text-underline-type="single" style:text-underline-style="solid" fo:font-weight="bold"/>
    </style:style>
    <style:style style:family="text" style:name="T8">
      <style:text-properties fo:color="#063C67" style:text-line-through-type="none" fo:font-family="Calibri" style:font-family-complex="Calibri" fo:font-size="8pt" style:font-size-asian="8pt" style:font-size-complex="8pt" fo:letter-spacing="0pt" fo:language="en" fo:country="US" style:text-underline-type="none"/>
    </style:style>
    <style:style style:family="text" style:name="T9">
      <style:text-properties fo:color="#063C67" style:text-line-through-type="none" fo:font-family="Calibri" style:font-family-complex="Calibri" fo:font-size="8pt" style:font-size-asian="8pt" style:font-size-complex="8pt" fo:letter-spacing="0pt" fo:language="fr" fo:country="FR" style:text-underline-type="none"/>
    </style:style>
    <style:style style:family="text" style:name="T10">
      <style:text-properties fo:color="#063C67" style:text-line-through-type="none" fo:font-family="Calibri" style:font-family-complex="Calibri" fo:font-size="8pt" style:font-size-asian="8pt" style:font-size-complex="8pt" fo:letter-spacing="0pt" fo:language="en" fo:country="US" style:text-underline-type="none"/>
    </style:style>
    <style:style style:family="paragraph" style:name="P25">
      <style:paragraph-properties/>
      <style:text-properties/>
    </style:style>
    <style:style style:family="text" style:name="T11">
      <style:text-properties fo:color="#063C67" style:text-line-through-type="none" fo:font-family="Calibri" style:font-family-complex="Calibri" fo:font-size="8pt" style:font-size-asian="8pt" style:font-size-complex="8pt" fo:letter-spacing="0pt" fo:language="en" fo:country="US" style:text-underline-type="single" style:text-underline-style="solid" fo:font-weight="bold"/>
    </style:style>
    <style:style style:family="text" style:name="T12">
      <style:text-properties fo:color="#063C67" style:text-line-through-type="none" fo:font-family="Calibri" style:font-family-complex="Calibri" fo:font-size="8pt" style:font-size-asian="8pt" style:font-size-complex="8pt" fo:letter-spacing="0pt" fo:language="en" fo:country="US" style:text-underline-type="none"/>
    </style:style>
    <style:style style:family="text" style:name="T13">
      <style:text-properties fo:color="#063C67" style:text-line-through-type="none" fo:font-family="Calibri" style:font-family-complex="Calibri" fo:font-size="8pt" style:font-size-asian="8pt" style:font-size-complex="8pt" fo:letter-spacing="0pt" fo:language="fr" fo:country="FR" style:text-underline-type="none"/>
    </style:style>
    <style:style style:family="text" style:name="T14">
      <style:text-properties fo:color="#063C67" style:text-line-through-type="none" fo:font-family="Calibri" style:font-family-complex="Calibri" fo:font-size="8pt" style:font-size-asian="8pt" style:font-size-complex="8pt" fo:letter-spacing="0pt" fo:language="en" fo:country="US" style:text-underline-type="none"/>
    </style:style>
    <style:style style:family="paragraph" style:name="P26">
      <style:paragraph-properties/>
      <style:text-properties/>
    </style:style>
    <style:style style:family="text" style:name="T15">
      <style:text-properties fo:color="#063C67" style:text-line-through-type="none" fo:font-family="Calibri" style:font-family-complex="Calibri" fo:font-size="8pt" style:font-size-asian="8pt" style:font-size-complex="8pt" fo:letter-spacing="0pt" fo:language="en" fo:country="US" style:text-underline-type="single" style:text-underline-style="solid" fo:font-weight="bold"/>
    </style:style>
    <style:style style:family="text" style:name="T16">
      <style:text-properties fo:color="#063C67" style:text-line-through-type="none" fo:font-family="Calibri" style:font-family-complex="Calibri" fo:font-size="8pt" style:font-size-asian="8pt" style:font-size-complex="8pt" fo:letter-spacing="0pt" fo:language="en" fo:country="US" style:text-underline-type="none"/>
    </style:style>
    <style:style style:family="text" style:name="T17">
      <style:text-properties fo:color="#063C67" style:text-line-through-type="none" fo:font-family="Calibri" style:font-family-complex="Calibri" fo:font-size="8pt" style:font-size-asian="8pt" style:font-size-complex="8pt" fo:letter-spacing="0pt" fo:language="fr" fo:country="FR" style:text-underline-type="none"/>
    </style:style>
    <style:style style:family="text" style:name="T18">
      <style:text-properties fo:color="#063C67" style:text-line-through-type="none" fo:font-family="Calibri" style:font-family-complex="Calibri" fo:font-size="8pt" style:font-size-asian="8pt" style:font-size-complex="8pt" fo:letter-spacing="0pt" fo:language="fr" fo:country="FR" style:text-underline-type="none"/>
    </style:style>
    <style:style style:family="text" style:name="T19">
      <style:text-properties fo:color="#063C67" style:text-line-through-type="none" fo:font-family="Calibri" style:font-family-complex="Calibri" fo:font-size="8pt" style:font-size-asian="8pt" style:font-size-complex="8pt" fo:letter-spacing="0pt" fo:language="fr" fo:country="FR" style:text-underline-type="none"/>
    </style:style>
    <style:style style:family="paragraph" style:name="P27">
      <style:paragraph-properties/>
      <style:text-properties/>
    </style:style>
    <style:style style:family="text" style:name="T20">
      <style:text-properties fo:color="#063C67" style:text-line-through-type="none" fo:font-family="Calibri" style:font-family-complex="Calibri" fo:font-size="8pt" style:font-size-asian="8pt" style:font-size-complex="8pt" fo:letter-spacing="0pt" fo:language="en" fo:country="US" style:text-underline-type="single" style:text-underline-style="solid" fo:font-weight="bold"/>
    </style:style>
    <style:style style:family="text" style:name="T21">
      <style:text-properties fo:color="#063C67" style:text-line-through-type="none" fo:font-family="Calibri" style:font-family-complex="Calibri" fo:font-size="8pt" style:font-size-asian="8pt" style:font-size-complex="8pt" fo:letter-spacing="0pt" fo:language="en" fo:country="US" style:text-underline-type="none"/>
    </style:style>
    <style:style style:family="paragraph" style:name="P28">
      <style:paragraph-properties/>
      <style:text-properties/>
    </style:style>
    <style:style style:family="text" style:name="T22">
      <style:text-properties fo:color="#063C67" style:text-line-through-type="none" fo:font-family="Calibri" style:font-family-complex="Calibri" fo:font-size="8pt" style:font-size-asian="8pt" style:font-size-complex="8pt" fo:letter-spacing="0pt" fo:language="en" fo:country="US" style:text-underline-type="single" style:text-underline-style="solid" fo:font-weight="bold"/>
    </style:style>
    <style:style style:family="text" style:name="T23">
      <style:text-properties fo:color="#063C67" style:text-line-through-type="none" fo:font-family="Calibri" style:font-family-complex="Calibri" fo:font-size="8pt" style:font-size-asian="8pt" style:font-size-complex="8pt" fo:letter-spacing="0pt" fo:language="en" fo:country="US" style:text-underline-type="none"/>
    </style:style>
    <style:style style:family="text" style:name="T24">
      <style:text-properties fo:color="#063C67" style:text-line-through-type="none" fo:font-family="Calibri" style:font-family-complex="Calibri" fo:font-size="8pt" style:font-size-asian="8pt" style:font-size-complex="8pt" fo:letter-spacing="0pt" fo:language="fr" fo:country="FR" style:text-underline-type="none"/>
    </style:style>
    <style:style style:family="text" style:name="T25">
      <style:text-properties fo:color="#063C67" style:text-line-through-type="none" fo:font-family="Calibri" style:font-family-complex="Calibri" fo:font-size="8pt" style:font-size-asian="8pt" style:font-size-complex="8pt" fo:letter-spacing="0pt" fo:language="fr" fo:country="FR" style:text-underline-type="none"/>
    </style:style>
    <style:style style:family="text" style:name="T26">
      <style:text-properties fo:color="#063C67" style:text-line-through-type="none" fo:font-family="Calibri" style:font-family-complex="Calibri" fo:font-size="8pt" style:font-size-asian="8pt" style:font-size-complex="8pt" fo:letter-spacing="0pt" fo:language="en" fo:country="US" style:text-underline-type="none"/>
    </style:style>
    <style:style style:family="paragraph" style:name="P29">
      <style:paragraph-properties/>
      <style:text-properties/>
    </style:style>
    <style:style style:family="text" style:name="T27">
      <style:text-properties fo:color="#063C67" style:text-line-through-type="none" fo:font-family="Calibri" style:font-family-complex="Calibri" fo:font-size="8pt" style:font-size-asian="8pt" style:font-size-complex="8pt" fo:letter-spacing="0pt" fo:language="en" fo:country="US" style:text-underline-type="single" style:text-underline-style="solid" fo:font-weight="bold"/>
    </style:style>
    <style:style style:family="text" style:name="T28">
      <style:text-properties fo:color="#063C67" style:text-line-through-type="none" fo:font-family="Calibri" style:font-family-complex="Calibri" fo:font-size="8pt" style:font-size-asian="8pt" style:font-size-complex="8pt" fo:letter-spacing="0pt" fo:language="en" fo:country="US" style:text-underline-type="none"/>
    </style:style>
    <style:style style:family="paragraph" style:name="P30">
      <style:paragraph-properties/>
      <style:text-properties/>
    </style:style>
    <style:style style:family="text" style:name="T29">
      <style:text-properties fo:color="#063C67" style:text-line-through-type="none" fo:font-family="Calibri" style:font-family-complex="Calibri" fo:font-size="8pt" style:font-size-asian="8pt" style:font-size-complex="8pt" fo:letter-spacing="0pt" fo:language="en" fo:country="US" style:text-underline-type="single" style:text-underline-style="solid" fo:font-weight="bold"/>
    </style:style>
    <style:style style:family="text" style:name="T30">
      <style:text-properties fo:color="#063C67" style:text-line-through-type="none" fo:font-family="Calibri" style:font-family-complex="Calibri" fo:font-size="8pt" style:font-size-asian="8pt" style:font-size-complex="8pt" fo:letter-spacing="0pt" fo:language="en" fo:country="US" style:text-underline-type="none"/>
    </style:style>
    <style:style style:family="text" style:name="T31">
      <style:text-properties fo:color="#063C67" style:text-line-through-type="none" fo:font-family="Calibri" style:font-family-complex="Calibri" fo:font-size="8pt" style:font-size-asian="8pt" style:font-size-complex="8pt" fo:letter-spacing="0pt" fo:language="en" fo:country="US" style:text-underline-type="none"/>
    </style:style>
    <style:style style:family="paragraph" style:name="P31">
      <style:paragraph-properties/>
      <style:text-properties/>
    </style:style>
    <style:style style:family="text" style:name="T32">
      <style:text-properties fo:color="#063C67" style:text-line-through-type="none" fo:font-family="Calibri" style:font-family-complex="Calibri" fo:font-size="8pt" style:font-size-asian="8pt" style:font-size-complex="8pt" fo:letter-spacing="0pt" fo:language="en" fo:country="US" style:text-underline-type="single" style:text-underline-style="solid" fo:font-weight="bold"/>
    </style:style>
    <style:style style:family="text" style:name="T33">
      <style:text-properties fo:color="#063C67" style:text-line-through-type="none" fo:font-family="Calibri" style:font-family-complex="Calibri" fo:font-size="8pt" style:font-size-asian="8pt" style:font-size-complex="8pt" fo:letter-spacing="0pt" fo:language="en" fo:country="US" style:text-underline-type="none"/>
    </style:style>
    <style:style style:family="paragraph" style:name="P32">
      <style:paragraph-properties/>
      <style:text-properties/>
    </style:style>
    <style:style style:family="text" style:name="T34">
      <style:text-properties fo:color="#063C67" style:text-line-through-type="none" fo:font-family="Calibri" style:font-family-complex="Calibri" fo:font-size="8pt" style:font-size-asian="8pt" style:font-size-complex="8pt" fo:letter-spacing="0pt" fo:language="en" fo:country="US" style:text-underline-type="single" style:text-underline-style="solid" fo:font-weight="bold"/>
    </style:style>
    <style:style style:family="text" style:name="T35">
      <style:text-properties fo:color="#063C67" style:text-line-through-type="none" fo:font-family="Calibri" style:font-family-complex="Calibri" fo:font-size="8pt" style:font-size-asian="8pt" style:font-size-complex="8pt" fo:letter-spacing="0pt" fo:language="en" fo:country="US" style:text-underline-type="none"/>
    </style:style>
    <style:style style:family="text" style:name="T36">
      <style:text-properties fo:color="#063C67" style:text-line-through-type="none" fo:font-family="Calibri" style:font-family-complex="Calibri" fo:font-size="8pt" style:font-size-asian="8pt" style:font-size-complex="8pt" fo:letter-spacing="0pt" fo:language="fr" fo:country="FR" style:text-underline-type="none"/>
    </style:style>
    <style:style style:family="text" style:name="T37">
      <style:text-properties fo:color="#063C67" style:text-line-through-type="none" fo:font-family="Calibri" style:font-family-complex="Calibri" fo:font-size="8pt" style:font-size-asian="8pt" style:font-size-complex="8pt" fo:letter-spacing="0pt" fo:language="en" fo:country="US" style:text-underline-type="none"/>
    </style:style>
    <style:style style:family="graphic" style:name="gr9">
      <style:graphic-properties draw:fill="none" draw:auto-grow-height="false" draw:auto-grow-width="false" draw:stroke="solid" svg:stroke-color="#E6E6E9" svg:stroke-width="0.05291cm" style:wrap="run-through"/>
    </style:style>
    <style:style style:family="paragraph" style:name="P33">
      <style:paragraph-properties/>
      <style:text-properties/>
    </style:style>
    <style:style style:family="graphic" style:name="gr10">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34">
      <style:paragraph-properties fo:line-height="90%" fo:text-align="justify" fo:margin-top="0pt" fo:margin-bottom="4.98pt"/>
      <style:text-properties/>
    </style:style>
    <style:style style:family="text" style:name="T38">
      <style:text-properties fo:color="#063C67" fo:font-family="Calibri" style:font-family-complex="Calibri" fo:font-size="7pt" style:font-size-asian="7pt" style:font-size-complex="7pt" fo:letter-spacing="0pt" fo:language="en" fo:country="US" style:text-underline-type="none"/>
    </style:style>
    <style:style style:family="text" style:name="T39">
      <style:text-properties fo:color="#063C67" fo:font-family="Calibri" style:font-family-complex="Calibri" fo:font-size="7pt" style:font-size-asian="7pt" style:font-size-complex="7pt" fo:letter-spacing="0pt" fo:language="fr" fo:country="FR" style:text-underline-type="none"/>
    </style:style>
    <style:style style:family="text" style:name="T40">
      <style:text-properties fo:color="#063C67" fo:font-family="Calibri" style:font-family-complex="Calibri" fo:font-size="7pt" style:font-size-asian="7pt" style:font-size-complex="7pt" fo:letter-spacing="0pt" fo:language="en" fo:country="US" style:text-underline-type="none"/>
    </style:style>
    <style:style style:family="text" style:name="T41">
      <style:text-properties fo:color="#063C67" fo:font-family="Calibri" style:font-family-complex="Calibri" fo:font-size="7pt" style:font-size-asian="7pt" style:font-size-complex="7pt" fo:letter-spacing="0pt" fo:language="fr" fo:country="FR" style:text-underline-type="none"/>
    </style:style>
    <style:style style:family="text" style:name="T42">
      <style:text-properties fo:color="#063C67" fo:font-family="Calibri" style:font-family-complex="Calibri" fo:font-size="7pt" style:font-size-asian="7pt" style:font-size-complex="7pt" fo:letter-spacing="0pt" fo:language="en" fo:country="US" style:text-underline-type="none"/>
    </style:style>
    <style:style style:family="graphic" style:name="gr11">
      <style:graphic-properties draw:fill="gradient" draw:fill-gradient-name="Gradient1" draw:textarea-vertical-align="middle" draw:auto-grow-height="false" draw:auto-grow-width="false" draw:stroke="none" style:wrap="run-through" fo:padding-top="5.669pt" fo:padding-bottom="5.669pt" fo:padding-left="7.2pt" fo:padding-right="7.2pt" fo:background-color="transparent"/>
    </style:style>
    <style:style style:family="paragraph" style:name="P35">
      <style:paragraph-properties fo:line-height="90%" fo:text-align="center" fo:margin-left="0pt" fo:margin-right="0pt" fo:text-indent="0pt" fo:margin-top="0pt" fo:margin-bottom="0pt"/>
      <style:text-properties/>
    </style:style>
    <style:style style:family="text" style:name="T43">
      <style:text-properties fo:text-transform="uppercase" fo:color="#FFFFFF" style:text-line-through-type="none" fo:font-family="Calibri" style:font-family-complex="Calibri" fo:font-size="7pt" style:font-size-asian="7pt" style:font-size-complex="7pt" fo:letter-spacing="0pt" fo:language="fr" fo:country="FR" style:text-underline-type="none" fo:font-weight="bold"/>
    </style:style>
    <style:style style:family="graphic" style:name="gr12">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36">
      <style:paragraph-properties fo:line-height="90%" fo:text-align="justify" fo:margin-top="0pt" fo:margin-bottom="4.98pt"/>
      <style:text-properties/>
    </style:style>
    <style:style style:family="text" style:name="T44">
      <style:text-properties fo:color="#063C67" fo:font-family="Calibri" style:font-family-complex="Calibri" fo:font-size="7pt" style:font-size-asian="7pt" style:font-size-complex="7pt" fo:letter-spacing="0pt" fo:language="en" fo:country="US" style:text-underline-type="none"/>
    </style:style>
    <style:style style:family="graphic" style:name="gr13">
      <style:graphic-properties draw:fill="gradient" draw:fill-gradient-name="Gradient2" draw:textarea-vertical-align="middle" draw:auto-grow-height="false" draw:auto-grow-width="false" draw:stroke="none" style:wrap="run-through" fo:padding-top="5.669pt" fo:padding-bottom="5.669pt" fo:padding-left="7.2pt" fo:padding-right="7.2pt" fo:background-color="transparent"/>
    </style:style>
    <style:style style:family="paragraph" style:name="P37">
      <style:paragraph-properties fo:line-height="90%" fo:text-align="center" fo:margin-left="0pt" fo:margin-right="0pt" fo:text-indent="0pt" fo:margin-top="0pt" fo:margin-bottom="0pt"/>
      <style:text-properties/>
    </style:style>
    <style:style style:family="text" style:name="T45">
      <style:text-properties fo:text-transform="uppercase" fo:color="#FFFFFF" style:text-line-through-type="none" fo:font-family="Calibri" style:font-family-complex="Calibri" fo:font-size="7pt" style:font-size-asian="7pt" style:font-size-complex="7pt" fo:letter-spacing="0pt" fo:language="fr" fo:country="FR" style:text-underline-type="none" fo:font-weight="bold"/>
    </style:style>
    <style:style style:family="graphic" style:name="gr14">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38">
      <style:paragraph-properties fo:line-height="90%" fo:text-align="justify" fo:margin-top="0pt" fo:margin-bottom="4.99pt"/>
      <style:text-properties/>
    </style:style>
    <style:style style:family="text" style:name="T46">
      <style:text-properties fo:color="#063C67" fo:font-family="Calibri" style:font-family-complex="Calibri" fo:font-size="7pt" style:font-size-asian="7pt" style:font-size-complex="7pt" fo:letter-spacing="0pt" fo:language="en" fo:country="US" style:text-underline-type="none"/>
    </style:style>
    <style:style style:family="graphic" style:name="gr15">
      <style:graphic-properties draw:fill="gradient" draw:fill-gradient-name="Gradient3" draw:textarea-vertical-align="middle" draw:auto-grow-height="false" draw:auto-grow-width="false" draw:stroke="none" style:wrap="run-through" fo:padding-top="5.669pt" fo:padding-bottom="5.669pt" fo:padding-left="7.2pt" fo:padding-right="7.2pt" fo:background-color="transparent"/>
    </style:style>
    <style:style style:family="paragraph" style:name="P39">
      <style:paragraph-properties fo:line-height="90%" fo:text-align="center" fo:margin-left="0pt" fo:margin-right="0pt" fo:text-indent="0pt" fo:margin-top="0pt" fo:margin-bottom="0pt"/>
      <style:text-properties/>
    </style:style>
    <style:style style:family="text" style:name="T47">
      <style:text-properties fo:text-transform="uppercase" fo:color="#FFFFFF" style:text-line-through-type="none" fo:font-family="Calibri" style:font-family-complex="Calibri" fo:font-size="7pt" style:font-size-asian="7pt" style:font-size-complex="7pt" fo:letter-spacing="0pt" fo:language="fr" fo:country="FR" style:text-underline-type="none" fo:font-weight="bold"/>
    </style:style>
    <style:style style:family="graphic" style:name="gr16">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40">
      <style:paragraph-properties fo:text-align="left"/>
      <style:text-properties/>
    </style:style>
    <style:style style:family="text" style:name="T48">
      <style:text-properties style:text-line-through-type="none" fo:font-size="6pt" style:font-size-asian="6pt" style:font-size-complex="6pt" fo:language="fr" fo:country="FR" fo:font-style="italic" style:text-underline-type="none"/>
    </style:style>
    <style:style style:family="graphic" style:name="gr17">
      <style:graphic-properties style:wrap="run-through" fo:background-color="transparent"/>
    </style:style>
    <style:style style:family="table-cell" style:name="ce1">
      <style:table-cell-properties/>
      <loext:graphic-properties draw:fill="none"/>
      <style:paragraph-properties/>
    </style:style>
    <style:style style:family="table" style:name="ta1">
      <style:table-properties style:width="6.242cm"/>
    </style:style>
    <style:style style:family="table-column" style:name="co1">
      <style:table-column-properties style:column-width="1.582cm"/>
    </style:style>
    <style:style style:family="table-column" style:name="co2">
      <style:table-column-properties style:column-width="4.66cm"/>
    </style:style>
    <style:style style:family="table-row" style:name="ro1">
      <style:graphic-properties/>
      <style:table-row-properties style:row-height="19.96pt"/>
    </style:style>
    <style:style style:family="table-cell" style:name="ce2">
      <style:table-cell-properties fo:padding-top="0.2835pt" fo:padding-bottom="0.2835pt" fo:padding-left="0.2835pt" fo:padding-right="0.2835pt"/>
      <loext:graphic-properties draw:fill-color="#4F81BD" draw:fill="solid" draw:auto-grow-height="false" draw:auto-grow-width="false" draw:stroke="solid" svg:stroke-color="#FFFFFF" svg:stroke-width="0.03528cm"/>
      <style:paragraph-properties fo:border-top="1pt solid #FFFFFF" fo:border-bottom="3pt solid #FFFFFF" fo:border-left="1pt solid #FFFFFF" fo:border-right="1pt solid #FFFFFF"/>
    </style:style>
    <style:style style:family="paragraph" style:name="P41">
      <style:paragraph-properties/>
      <style:text-properties/>
    </style:style>
    <style:style style:family="text" style:name="T49">
      <style:text-properties fo:color="#FFFFFF" fo:font-family="Calibri" style:font-family-complex="Calibri" fo:font-size="7pt" style:font-size-asian="7pt" style:font-size-complex="7pt" style:text-underline-type="none" fo:font-weight="bold"/>
    </style:style>
    <style:style style:family="table-cell" style:name="ce3">
      <style:table-cell-properties fo:padding-top="0.2835pt" fo:padding-bottom="0.2835pt" fo:padding-left="0.2835pt" fo:padding-right="0.2835pt"/>
      <loext:graphic-properties draw:fill-color="#4F81BD" draw:fill="solid" draw:auto-grow-height="false" draw:auto-grow-width="false" draw:stroke="solid" svg:stroke-color="#FFFFFF" svg:stroke-width="0.03528cm"/>
      <style:paragraph-properties fo:border-top="1pt solid #FFFFFF" fo:border-bottom="3pt solid #FFFFFF" fo:border-left="1pt solid #FFFFFF" fo:border-right="1pt solid #FFFFFF"/>
    </style:style>
    <style:style style:family="paragraph" style:name="P42">
      <style:paragraph-properties/>
      <style:text-properties/>
    </style:style>
    <style:style style:family="text" style:name="T50">
      <style:text-properties fo:color="#FFFFFF" fo:font-family="Calibri" style:font-family-complex="Calibri" fo:font-size="7pt" style:font-size-asian="7pt" style:font-size-complex="7pt" style:text-underline-type="none" fo:font-weight="bold"/>
    </style:style>
    <style:style style:family="table-row" style:name="ro2">
      <style:graphic-properties/>
      <style:table-row-properties style:row-height="25.56pt"/>
    </style:style>
    <style:style style:family="table-cell" style:name="ce4">
      <style:table-cell-properties fo:padding-top="0.2835pt" fo:padding-bottom="0.2835pt" fo:padding-left="0.2835pt" fo:padding-right="0.2835pt"/>
      <loext:graphic-properties draw:fill-color="#B8CCE4" draw:fill="solid" draw:auto-grow-height="false" draw:auto-grow-width="false" draw:stroke="solid" svg:stroke-color="#FFFFFF" svg:stroke-width="0.03528cm"/>
      <style:paragraph-properties fo:border="1pt solid #FFFFFF"/>
    </style:style>
    <style:style style:family="paragraph" style:name="P43">
      <style:paragraph-properties/>
      <style:text-properties/>
    </style:style>
    <style:style style:family="text" style:name="T51">
      <style:text-properties fo:color="#1F1F1F" fo:font-family="Calibri" style:font-family-complex="Calibri" fo:font-size="7pt" style:font-size-asian="7pt" style:font-size-complex="7pt" style:text-underline-type="none" fo:font-weight="bold"/>
    </style:style>
    <style:style style:family="table-cell" style:name="ce5">
      <style:table-cell-properties fo:padding-top="0.2835pt" fo:padding-bottom="0.2835pt" fo:padding-left="0.2835pt" fo:padding-right="0.2835pt"/>
      <loext:graphic-properties draw:fill-color="#B8CCE4" draw:fill="solid" draw:auto-grow-height="false" draw:auto-grow-width="false" draw:stroke="solid" svg:stroke-color="#FFFFFF" svg:stroke-width="0.03528cm"/>
      <style:paragraph-properties fo:border="1pt solid #FFFFFF"/>
    </style:style>
    <style:style style:family="paragraph" style:name="P44">
      <style:paragraph-properties/>
      <style:text-properties/>
    </style:style>
    <style:style style:family="text" style:name="T52">
      <style:text-properties fo:color="#1F1F1F" fo:font-family="Calibri" style:font-family-complex="Calibri" fo:font-size="7pt" style:font-size-asian="7pt" style:font-size-complex="7pt" style:text-underline-type="none" fo:font-weight="bold"/>
    </style:style>
    <style:style style:family="text" style:name="T53">
      <style:text-properties fo:color="#1F1F1F" fo:font-family="Calibri" style:font-family-complex="Calibri" fo:font-size="7pt" style:font-size-asian="7pt" style:font-size-complex="7pt" style:text-underline-type="none"/>
    </style:style>
    <style:style style:family="text" style:name="T54">
      <style:text-properties fo:color="#1F1F1F" fo:font-family="Calibri" style:font-family-complex="Calibri" fo:font-size="7pt" style:font-size-asian="7pt" style:font-size-complex="7pt" style:text-underline-type="none" fo:font-weight="bold"/>
    </style:style>
    <style:style style:family="text" style:name="T55">
      <style:text-properties fo:color="#1F1F1F" fo:font-family="Calibri" style:font-family-complex="Calibri" fo:font-size="7pt" style:font-size-asian="7pt" style:font-size-complex="7pt" style:text-underline-type="none"/>
    </style:style>
    <style:style style:family="text" style:name="T56">
      <style:text-properties fo:color="#1F1F1F" fo:font-family="Calibri" style:font-family-complex="Calibri" fo:font-size="7pt" style:font-size-asian="7pt" style:font-size-complex="7pt" style:text-underline-type="none" fo:font-weight="bold"/>
    </style:style>
    <style:style style:family="text" style:name="T57">
      <style:text-properties fo:color="#1F1F1F" fo:font-family="Calibri" style:font-family-complex="Calibri" fo:font-size="7pt" style:font-size-asian="7pt" style:font-size-complex="7pt" style:text-underline-type="none"/>
    </style:style>
    <style:style style:family="text" style:name="T58">
      <style:text-properties fo:color="#1F1F1F" fo:font-family="Calibri" style:font-family-complex="Calibri" fo:font-size="7pt" style:font-size-asian="7pt" style:font-size-complex="7pt" style:text-underline-type="none" fo:font-weight="bold"/>
    </style:style>
    <style:style style:family="text" style:name="T59">
      <style:text-properties fo:color="#1F1F1F" fo:font-family="Calibri" style:font-family-complex="Calibri" fo:font-size="7pt" style:font-size-asian="7pt" style:font-size-complex="7pt" style:text-underline-type="none"/>
    </style:style>
    <style:style style:family="text" style:name="T60">
      <style:text-properties fo:color="#1F1F1F" fo:font-family="Calibri" style:font-family-complex="Calibri" fo:font-size="7pt" style:font-size-asian="7pt" style:font-size-complex="7pt" style:text-underline-type="none" fo:font-weight="bold"/>
    </style:style>
    <style:style style:family="text" style:name="T61">
      <style:text-properties fo:color="#1F1F1F" fo:font-family="Calibri" style:font-family-complex="Calibri" fo:font-size="7pt" style:font-size-asian="7pt" style:font-size-complex="7pt" style:text-underline-type="none"/>
    </style:style>
    <style:style style:family="table-row" style:name="ro3">
      <style:graphic-properties/>
      <style:table-row-properties style:row-height="19.96pt"/>
    </style:style>
    <style:style style:family="table-cell" style:name="ce6">
      <style:table-cell-properties fo:padding-top="0.2835pt" fo:padding-bottom="0.2835pt" fo:padding-left="0.2835pt" fo:padding-right="0.2835pt"/>
      <loext:graphic-properties draw:fill-color="#DBE5F1" draw:fill="solid" draw:auto-grow-height="false" draw:auto-grow-width="false" draw:stroke="solid" svg:stroke-color="#FFFFFF" svg:stroke-width="0.03528cm"/>
      <style:paragraph-properties fo:border="1pt solid #FFFFFF"/>
    </style:style>
    <style:style style:family="paragraph" style:name="P45">
      <style:paragraph-properties/>
      <style:text-properties/>
    </style:style>
    <style:style style:family="text" style:name="T62">
      <style:text-properties fo:color="#1F1F1F" fo:font-family="Calibri" style:font-family-complex="Calibri" fo:font-size="7pt" style:font-size-asian="7pt" style:font-size-complex="7pt" style:text-underline-type="none" fo:font-weight="bold"/>
    </style:style>
    <style:style style:family="table-cell" style:name="ce7">
      <style:table-cell-properties fo:padding-top="0.2835pt" fo:padding-bottom="0.2835pt" fo:padding-left="0.2835pt" fo:padding-right="0.2835pt"/>
      <loext:graphic-properties draw:fill-color="#DBE5F1" draw:fill="solid" draw:auto-grow-height="false" draw:auto-grow-width="false" draw:stroke="solid" svg:stroke-color="#FFFFFF" svg:stroke-width="0.03528cm"/>
      <style:paragraph-properties fo:border="1pt solid #FFFFFF"/>
    </style:style>
    <style:style style:family="paragraph" style:name="P46">
      <style:paragraph-properties/>
      <style:text-properties/>
    </style:style>
    <style:style style:family="text" style:name="T63">
      <style:text-properties fo:color="#1F1F1F" fo:font-family="Calibri" style:font-family-complex="Calibri" fo:font-size="7pt" style:font-size-asian="7pt" style:font-size-complex="7pt" style:text-underline-type="none" fo:font-weight="bold"/>
    </style:style>
    <style:style style:family="text" style:name="T64">
      <style:text-properties fo:color="#1F1F1F" fo:font-family="Calibri" style:font-family-complex="Calibri" fo:font-size="7pt" style:font-size-asian="7pt" style:font-size-complex="7pt" style:text-underline-type="none"/>
    </style:style>
    <style:style style:family="text" style:name="T65">
      <style:text-properties fo:color="#1F1F1F" fo:font-family="Calibri" style:font-family-complex="Calibri" fo:font-size="7pt" style:font-size-asian="7pt" style:font-size-complex="7pt" style:text-underline-type="none" fo:font-weight="bold"/>
    </style:style>
    <style:style style:family="text" style:name="T66">
      <style:text-properties fo:color="#1F1F1F" fo:font-family="Calibri" style:font-family-complex="Calibri" fo:font-size="7pt" style:font-size-asian="7pt" style:font-size-complex="7pt" style:text-underline-type="none"/>
    </style:style>
    <style:style style:family="table-row" style:name="ro4">
      <style:graphic-properties/>
      <style:table-row-properties style:row-height="25.56pt"/>
    </style:style>
    <style:style style:family="table-cell" style:name="ce8">
      <style:table-cell-properties fo:padding-top="0.2835pt" fo:padding-bottom="0.2835pt" fo:padding-left="0.2835pt" fo:padding-right="0.2835pt"/>
      <loext:graphic-properties draw:fill-color="#B8CCE4" draw:fill="solid" draw:auto-grow-height="false" draw:auto-grow-width="false" draw:stroke="solid" svg:stroke-color="#FFFFFF" svg:stroke-width="0.03528cm"/>
      <style:paragraph-properties fo:border="1pt solid #FFFFFF"/>
    </style:style>
    <style:style style:family="paragraph" style:name="P47">
      <style:paragraph-properties/>
      <style:text-properties/>
    </style:style>
    <style:style style:family="text" style:name="T67">
      <style:text-properties fo:color="#1F1F1F" fo:font-family="Calibri" style:font-family-complex="Calibri" fo:font-size="7pt" style:font-size-asian="7pt" style:font-size-complex="7pt" style:text-underline-type="none" fo:font-weight="bold"/>
    </style:style>
    <style:style style:family="table-cell" style:name="ce9">
      <style:table-cell-properties fo:padding-top="0.2835pt" fo:padding-bottom="0.2835pt" fo:padding-left="0.2835pt" fo:padding-right="0.2835pt"/>
      <loext:graphic-properties draw:fill-color="#B8CCE4" draw:fill="solid" draw:auto-grow-height="false" draw:auto-grow-width="false" draw:stroke="solid" svg:stroke-color="#FFFFFF" svg:stroke-width="0.03528cm"/>
      <style:paragraph-properties fo:border="1pt solid #FFFFFF"/>
    </style:style>
    <style:style style:family="paragraph" style:name="P48">
      <style:paragraph-properties/>
      <style:text-properties/>
    </style:style>
    <style:style style:family="text" style:name="T68">
      <style:text-properties fo:color="#1F1F1F" fo:font-family="Calibri" style:font-family-complex="Calibri" fo:font-size="7pt" style:font-size-asian="7pt" style:font-size-complex="7pt" style:text-underline-type="none" fo:font-weight="bold"/>
    </style:style>
    <style:style style:family="text" style:name="T69">
      <style:text-properties fo:color="#1F1F1F" fo:font-family="Calibri" style:font-family-complex="Calibri" fo:font-size="7pt" style:font-size-asian="7pt" style:font-size-complex="7pt" style:text-underline-type="none"/>
    </style:style>
    <style:style style:family="text" style:name="T70">
      <style:text-properties fo:color="#1F1F1F" fo:font-family="Calibri" style:font-family-complex="Calibri" fo:font-size="7pt" style:font-size-asian="7pt" style:font-size-complex="7pt" style:text-underline-type="none" fo:font-weight="bold"/>
    </style:style>
    <style:style style:family="text" style:name="T71">
      <style:text-properties fo:color="#1F1F1F" fo:font-family="Calibri" style:font-family-complex="Calibri" fo:font-size="7pt" style:font-size-asian="7pt" style:font-size-complex="7pt" style:text-underline-type="none"/>
    </style:style>
    <style:style style:family="text" style:name="T72">
      <style:text-properties fo:color="#1F1F1F" fo:font-family="Calibri" style:font-family-complex="Calibri" fo:font-size="7pt" style:font-size-asian="7pt" style:font-size-complex="7pt" style:text-underline-type="none" fo:font-weight="bold"/>
    </style:style>
    <style:style style:family="text" style:name="T73">
      <style:text-properties fo:color="#1F1F1F" fo:font-family="Calibri" style:font-family-complex="Calibri" fo:font-size="7pt" style:font-size-asian="7pt" style:font-size-complex="7pt" style:text-underline-type="none"/>
    </style:style>
    <style:style style:family="drawing-page" style:name="dp6">
      <style:drawing-page-properties/>
    </style:style>
    <style:style style:family="presentation" style:name="pr7">
      <style:graphic-properties draw:fill="none" draw:textarea-vertical-align="top" draw:auto-grow-height="true" draw:fit-to-size="false" style:shrink-to-fit="false" draw:stroke="none" fo:wrap-option="no-wrap" style:wrap="run-through" fo:background-color="transparent"/>
    </style:style>
    <style:style style:family="paragraph" style:name="P49">
      <style:paragraph-properties/>
      <style:text-properties/>
    </style:style>
    <style:style style:family="paragraph" style:name="P50">
      <style:paragraph-properties/>
      <style:text-properties/>
    </style:style>
    <style:style style:family="presentation" style:name="pr8">
      <style:graphic-properties draw:fill="none" draw:textarea-vertical-align="top" draw:auto-grow-height="true" draw:fit-to-size="false" style:shrink-to-fit="false" draw:stroke="none" fo:wrap-option="no-wrap" style:wrap="run-through" fo:background-color="transparent"/>
    </style:style>
    <style:style style:family="paragraph" style:name="P51">
      <style:paragraph-properties/>
      <style:text-properties/>
    </style:style>
    <style:style style:family="paragraph" style:name="P52">
      <style:paragraph-properties/>
      <style:text-properties/>
    </style:style>
    <style:style style:family="presentation" style:name="pr9">
      <style:graphic-properties draw:fill="none" draw:textarea-vertical-align="top" draw:auto-grow-height="true" draw:fit-to-size="false" style:shrink-to-fit="false" draw:stroke="none" fo:wrap-option="no-wrap" style:wrap="run-through" fo:background-color="transparent"/>
    </style:style>
    <style:style style:family="paragraph" style:name="P53">
      <style:paragraph-properties/>
      <style:text-properties/>
    </style:style>
    <style:style style:family="paragraph" style:name="P54">
      <style:paragraph-properties/>
      <style:text-properties/>
    </style:style>
    <style:style style:family="text" style:name="T74">
      <style:text-properties/>
    </style:style>
    <style:style style:family="drawing-page" style:name="dp7">
      <style:drawing-page-properties draw:fill-color="#FFFFFF" draw:fill="solid"/>
    </style:style>
    <style:style style:family="graphic" style:name="gr18">
      <style:graphic-properties draw:fill="none" draw:auto-grow-height="false" draw:auto-grow-width="false" draw:stroke="dotted" svg:stroke-color="#7F7F7F" svg:stroke-width="0.03528cm"/>
    </style:style>
    <style:style style:family="paragraph" style:name="P55">
      <style:paragraph-properties/>
      <style:text-properties/>
    </style:style>
    <style:style style:family="presentation" style:name="pr10">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56">
      <style:paragraph-properties/>
      <style:text-properties/>
    </style:style>
    <style:style style:family="paragraph" style:name="P57">
      <style:paragraph-properties fo:line-height="90%" fo:text-align="left" fo:margin-left="0pt" fo:margin-right="0pt" fo:text-indent="0pt" fo:margin-top="0pt" fo:margin-bottom="0pt"/>
      <style:text-properties/>
    </style:style>
    <style:style style:family="text" style:name="T75">
      <style:text-properties fo:text-transform="uppercase" fo:color="#043962" fo:font-family="Arial Black" style:font-family-complex="Arial Black" fo:font-size="24pt" style:font-size-asian="24pt" style:font-size-complex="24pt" fo:letter-spacing="0pt" fo:language="fr" fo:country="FR" style:text-underline-type="none" fo:font-weight="bold"/>
    </style:style>
    <style:style style:family="presentation" style:name="pr11">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58">
      <style:paragraph-properties/>
      <style:text-properties/>
    </style:style>
    <style:style style:family="paragraph" style:name="P59">
      <style:paragraph-properties/>
      <style:text-properties/>
    </style:style>
    <style:style style:family="text" style:name="T76">
      <style:text-properties fo:color="#000000" fo:font-family="Arial" style:font-family-complex="Arial" fo:font-size="14pt" style:font-size-asian="14pt" style:font-size-complex="14pt" fo:letter-spacing="0pt" fo:language="fr" fo:country="FR" style:text-underline-type="none"/>
    </style:style>
    <style:style style:family="graphic" style:name="gr19">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60">
      <style:paragraph-properties fo:line-height="90%" fo:text-align="justify" fo:margin-top="0pt" fo:margin-bottom="4.98pt"/>
      <style:text-properties/>
    </style:style>
    <style:style style:family="text" style:name="T77">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20">
      <style:graphic-properties draw:fill="none" draw:auto-grow-height="false" draw:auto-grow-width="false" draw:stroke="solid" svg:stroke-color="#E6E6E9" svg:stroke-width="0.05291cm" style:wrap="run-through"/>
    </style:style>
    <style:style style:family="paragraph" style:name="P61">
      <style:paragraph-properties/>
      <style:text-properties/>
    </style:style>
    <style:style style:family="graphic" style:name="gr21">
      <style:graphic-properties draw:fill="gradient" draw:fill-gradient-name="Gradient4" draw:textarea-vertical-align="middle" draw:auto-grow-height="false" draw:auto-grow-width="false" draw:stroke="none" style:wrap="run-through" fo:padding-top="5.669pt" fo:padding-bottom="5.669pt" fo:padding-left="7.2pt" fo:padding-right="7.2pt" fo:background-color="transparent"/>
    </style:style>
    <style:style style:family="paragraph" style:name="P62">
      <style:paragraph-properties fo:line-height="90%" fo:text-align="center" fo:margin-left="0pt" fo:margin-right="0pt" fo:text-indent="0pt" fo:margin-top="0pt" fo:margin-bottom="0pt"/>
      <style:text-properties/>
    </style:style>
    <style:style style:family="text" style:name="T78">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22">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63">
      <style:paragraph-properties fo:line-height="90%" fo:text-align="justify" fo:margin-left="0pt" fo:margin-right="0pt" fo:text-indent="0pt" fo:margin-top="0pt" fo:margin-bottom="0pt"/>
      <style:text-properties/>
    </style:style>
    <style:style style:family="text" style:name="T79">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paragraph" style:name="P64">
      <style:paragraph-properties fo:line-height="90%" fo:text-align="justify" fo:margin-left="0pt" fo:margin-right="0pt" fo:text-indent="0pt" fo:margin-top="0pt" fo:margin-bottom="0pt"/>
      <style:text-properties/>
    </style:style>
    <style:style style:family="paragraph" style:name="P65">
      <style:paragraph-properties fo:line-height="90%" fo:text-align="justify" fo:margin-left="0pt" fo:margin-right="0pt" fo:text-indent="0pt" fo:margin-top="0pt" fo:margin-bottom="0pt"/>
      <style:text-properties/>
    </style:style>
    <style:style style:family="text" style:name="T80">
      <style:text-properties fo:color="#043962" style:text-line-through-type="none" fo:font-family="Calibri" style:font-family-complex="Calibri" fo:font-size="8pt" style:font-size-asian="8pt" style:font-size-complex="8pt" fo:letter-spacing="0pt" fo:language="en" fo:country="US" style:text-underline-type="none"/>
    </style:style>
    <style:style style:family="graphic" style:name="gr23">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66">
      <style:paragraph-properties fo:line-height="90%" fo:text-align="justify" fo:margin-top="0pt" fo:margin-bottom="4.97pt"/>
      <style:text-properties/>
    </style:style>
    <style:style style:family="text" style:name="T81">
      <style:text-properties fo:color="#063C67" style:text-line-through-type="none" fo:font-family="Calibri" style:font-family-complex="Calibri" fo:font-size="7pt" style:font-size-asian="7pt" style:font-size-complex="7pt" fo:letter-spacing="0pt" fo:language="en" fo:country="US" style:text-underline-type="none"/>
    </style:style>
    <style:style style:family="text" style:name="T82">
      <style:text-properties fo:color="#063C67" style:text-line-through-type="none" fo:font-family="Calibri" style:font-family-complex="Calibri" fo:font-size="7pt" style:font-size-asian="7pt" style:font-size-complex="7pt" fo:letter-spacing="0pt" fo:language="fr" fo:country="FR" style:text-underline-type="none"/>
    </style:style>
    <style:style style:family="text" style:name="T83">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24">
      <style:graphic-properties draw:fill="gradient" draw:fill-gradient-name="Gradient5" draw:textarea-vertical-align="middle" draw:auto-grow-height="false" draw:auto-grow-width="false" draw:stroke="none" style:wrap="run-through" fo:padding-top="5.669pt" fo:padding-bottom="5.669pt" fo:padding-left="7.2pt" fo:padding-right="7.2pt" fo:background-color="transparent"/>
    </style:style>
    <style:style style:family="paragraph" style:name="P67">
      <style:paragraph-properties fo:line-height="90%" fo:text-align="center" fo:margin-left="0pt" fo:margin-right="0pt" fo:text-indent="0pt" fo:margin-top="0pt" fo:margin-bottom="0pt"/>
      <style:text-properties/>
    </style:style>
    <style:style style:family="text" style:name="T84">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25">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68">
      <style:paragraph-properties fo:line-height="90%" fo:text-align="justify" fo:margin-top="0pt" fo:margin-bottom="4.97pt"/>
      <style:text-properties/>
    </style:style>
    <style:style style:family="text" style:name="T85">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26">
      <style:graphic-properties draw:fill="gradient" draw:fill-gradient-name="Gradient6" draw:textarea-vertical-align="middle" draw:auto-grow-height="false" draw:auto-grow-width="false" draw:stroke="none" style:wrap="run-through" fo:padding-top="5.669pt" fo:padding-bottom="5.669pt" fo:padding-left="7.2pt" fo:padding-right="7.2pt" fo:background-color="transparent"/>
    </style:style>
    <style:style style:family="paragraph" style:name="P69">
      <style:paragraph-properties fo:line-height="90%" fo:text-align="center" fo:margin-left="0pt" fo:margin-right="0pt" fo:text-indent="0pt" fo:margin-top="0pt" fo:margin-bottom="0pt"/>
      <style:text-properties/>
    </style:style>
    <style:style style:family="text" style:name="T86">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27">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70">
      <style:paragraph-properties fo:line-height="90%" fo:text-align="left" fo:margin-top="0pt" fo:margin-bottom="4.97pt"/>
      <style:text-properties/>
    </style:style>
    <style:style style:family="text" style:name="T87">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28">
      <style:graphic-properties draw:fill="gradient" draw:fill-gradient-name="Gradient7" draw:textarea-vertical-align="middle" draw:auto-grow-height="false" draw:auto-grow-width="false" draw:stroke="none" style:wrap="run-through" fo:padding-top="5.669pt" fo:padding-bottom="5.669pt" fo:padding-left="7.2pt" fo:padding-right="7.2pt" fo:background-color="transparent"/>
    </style:style>
    <style:style style:family="paragraph" style:name="P71">
      <style:paragraph-properties fo:line-height="90%" fo:text-align="center" fo:margin-left="0pt" fo:margin-right="0pt" fo:text-indent="0pt" fo:margin-top="0pt" fo:margin-bottom="0pt"/>
      <style:text-properties/>
    </style:style>
    <style:style style:family="text" style:name="T88">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parent-style-name="Graphics" style:family="graphic" style:name="gr29">
      <style:graphic-properties draw:image-opacity="100%" style:repeat="stretch" draw:stroke="none" style:wrap="run-through" fo:background-color="transparent"/>
    </style:style>
    <style:style style:parent-style-name="Graphics" style:family="graphic" style:name="gr30">
      <style:graphic-properties draw:image-opacity="100%" style:repeat="stretch" draw:stroke="none" style:wrap="run-through" fo:background-color="transparent"/>
    </style:style>
    <style:style style:family="graphic" style:name="gr31">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72">
      <style:paragraph-properties fo:line-height="90%" fo:text-align="justify" fo:margin-left="0pt" fo:margin-right="0pt" fo:text-indent="0pt" fo:margin-top="0pt" fo:margin-bottom="0pt"/>
      <style:text-properties/>
    </style:style>
    <style:style style:family="text" style:name="T89">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text" style:name="T90">
      <style:text-properties fo:color="#1D93C9" style:text-line-through-type="none" fo:font-family="Calibri" style:font-family-complex="Calibri" fo:font-size="12pt" style:font-size-asian="12pt" style:font-size-complex="12pt" fo:letter-spacing="0pt" fo:language="fr" fo:country="FR" style:text-underline-type="none" fo:font-weight="bold"/>
    </style:style>
    <style:style style:family="paragraph" style:name="P73">
      <style:paragraph-properties fo:line-height="90%" fo:text-align="justify" fo:margin-left="0pt" fo:margin-right="0pt" fo:text-indent="0pt" fo:margin-top="0pt" fo:margin-bottom="0pt"/>
      <style:text-properties/>
    </style:style>
    <style:style style:family="paragraph" style:name="P74">
      <style:paragraph-properties fo:line-height="90%" fo:text-align="justify" fo:margin-left="0pt" fo:margin-right="0pt" fo:text-indent="0pt" fo:margin-top="0pt" fo:margin-bottom="0pt"/>
      <style:text-properties/>
    </style:style>
    <style:style style:family="text" style:name="T91">
      <style:text-properties fo:color="#043962" style:text-line-through-type="none" fo:font-family="Calibri" style:font-family-complex="Calibri" fo:font-size="8pt" style:font-size-asian="8pt" style:font-size-complex="8pt" fo:letter-spacing="0pt" fo:language="en" fo:country="US" style:text-underline-type="none"/>
    </style:style>
    <style:style style:family="text" style:name="T92">
      <style:text-properties fo:color="#043962" style:text-line-through-type="none" fo:font-family="Calibri" style:font-family-complex="Calibri" fo:font-size="8pt" style:font-size-asian="8pt" style:font-size-complex="8pt" fo:letter-spacing="0pt" fo:language="fr" fo:country="FR" style:text-underline-type="none"/>
    </style:style>
    <style:style style:family="text" style:name="T93">
      <style:text-properties fo:color="#043962" style:text-line-through-type="none" fo:font-family="Calibri" style:font-family-complex="Calibri" fo:font-size="8pt" style:font-size-asian="8pt" style:font-size-complex="8pt" fo:letter-spacing="0pt" fo:language="en" fo:country="US" style:text-underline-type="none"/>
    </style:style>
    <style:style style:family="graphic" style:name="gr32">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75">
      <style:paragraph-properties fo:line-height="90%" fo:text-align="justify" fo:margin-left="0pt" fo:margin-right="0pt" fo:text-indent="0pt" fo:margin-top="0pt" fo:margin-bottom="0pt"/>
      <style:text-properties/>
    </style:style>
    <style:style style:family="text" style:name="T94">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paragraph" style:name="P76">
      <style:paragraph-properties fo:line-height="90%" fo:text-align="justify" fo:margin-left="0pt" fo:margin-right="0pt" fo:text-indent="0pt" fo:margin-top="0pt" fo:margin-bottom="0pt"/>
      <style:text-properties/>
    </style:style>
    <style:style style:family="paragraph" style:name="P77">
      <style:paragraph-properties fo:line-height="90%" fo:text-align="justify" fo:margin-left="0pt" fo:margin-right="0pt" fo:text-indent="0pt" fo:margin-top="0pt" fo:margin-bottom="0pt"/>
      <style:text-properties/>
    </style:style>
    <style:style style:family="text" style:name="T95">
      <style:text-properties fo:color="#043962" style:text-line-through-type="none" fo:font-family="Calibri" style:font-family-complex="Calibri" fo:font-size="8pt" style:font-size-asian="8pt" style:font-size-complex="8pt" fo:letter-spacing="0pt" fo:language="fr" fo:country="FR" style:text-underline-type="none"/>
    </style:style>
    <style:style style:family="text" style:name="T96">
      <style:text-properties fo:color="#043962" style:text-line-through-type="none" fo:font-family="Calibri" style:font-family-complex="Calibri" fo:font-size="8pt" style:font-size-asian="8pt" style:font-size-complex="8pt" fo:letter-spacing="0pt" fo:language="en" fo:country="US" style:text-underline-type="none"/>
    </style:style>
    <style:style style:family="text" style:name="T97">
      <style:text-properties fo:color="#043962" style:text-line-through-type="none" fo:font-family="Calibri" style:font-family-complex="Calibri" fo:font-size="8pt" style:font-size-asian="8pt" style:font-size-complex="8pt" fo:letter-spacing="0pt" fo:language="fr" fo:country="FR" style:text-underline-type="none"/>
    </style:style>
    <style:style style:parent-style-name="Graphics" style:family="graphic" style:name="gr33">
      <style:graphic-properties style:repeat="stretch" style:wrap="run-through" fo:background-color="transparent"/>
    </style:style>
    <style:style style:parent-style-name="Graphics" style:family="graphic" style:name="gr34">
      <style:graphic-properties style:repeat="stretch" style:wrap="run-through" fo:background-color="transparent"/>
    </style:style>
    <style:style style:family="graphic" style:name="gr35">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78">
      <style:paragraph-properties fo:text-align="left"/>
      <style:text-properties/>
    </style:style>
    <style:style style:family="text" style:name="T98">
      <style:text-properties style:text-line-through-type="none" fo:font-size="6pt" style:font-size-asian="6pt" style:font-size-complex="6pt" fo:language="fr" fo:country="FR" fo:font-style="italic" style:text-underline-type="none"/>
    </style:style>
    <style:style style:family="graphic" style:name="gr36">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79">
      <style:paragraph-properties fo:text-align="left"/>
      <style:text-properties/>
    </style:style>
    <style:style style:family="text" style:name="T99">
      <style:text-properties fo:color="#FFFFFF" style:text-line-through-type="none" fo:font-size="6pt" style:font-size-asian="6pt" style:font-size-complex="6pt" fo:language="fr" fo:country="FR" fo:font-style="italic" style:text-underline-type="none"/>
    </style:style>
    <style:style style:family="drawing-page" style:name="dp8">
      <style:drawing-page-properties/>
    </style:style>
    <style:style style:family="presentation" style:name="pr12">
      <style:graphic-properties draw:fill="none" draw:textarea-vertical-align="top" draw:auto-grow-height="true" draw:fit-to-size="false" style:shrink-to-fit="false" draw:stroke="none" fo:wrap-option="no-wrap" style:wrap="run-through" fo:background-color="transparent"/>
    </style:style>
    <style:style style:family="paragraph" style:name="P80">
      <style:paragraph-properties/>
      <style:text-properties/>
    </style:style>
    <style:style style:family="paragraph" style:name="P81">
      <style:paragraph-properties/>
      <style:text-properties/>
    </style:style>
    <style:style style:family="presentation" style:name="pr13">
      <style:graphic-properties draw:fill="none" draw:textarea-vertical-align="top" draw:auto-grow-height="true" draw:fit-to-size="false" style:shrink-to-fit="false" draw:stroke="none" fo:wrap-option="no-wrap" style:wrap="run-through" fo:background-color="transparent"/>
    </style:style>
    <style:style style:family="paragraph" style:name="P82">
      <style:paragraph-properties/>
      <style:text-properties/>
    </style:style>
    <style:style style:family="paragraph" style:name="P83">
      <style:paragraph-properties/>
      <style:text-properties/>
    </style:style>
    <style:style style:family="presentation" style:name="pr14">
      <style:graphic-properties draw:fill="none" draw:textarea-vertical-align="top" draw:auto-grow-height="true" draw:fit-to-size="false" style:shrink-to-fit="false" draw:stroke="none" fo:wrap-option="no-wrap" style:wrap="run-through" fo:background-color="transparent"/>
    </style:style>
    <style:style style:family="paragraph" style:name="P84">
      <style:paragraph-properties/>
      <style:text-properties/>
    </style:style>
    <style:style style:family="paragraph" style:name="P85">
      <style:paragraph-properties/>
      <style:text-properties/>
    </style:style>
    <style:style style:family="text" style:name="T100">
      <style:text-properties/>
    </style:style>
    <style:style style:family="drawing-page" style:name="dp9">
      <style:drawing-page-properties draw:fill-color="#FFFFFF" draw:fill="solid"/>
    </style:style>
    <style:style style:family="graphic" style:name="gr37">
      <style:graphic-properties draw:fill="none" draw:auto-grow-height="false" draw:auto-grow-width="false" draw:stroke="dotted" svg:stroke-color="#7F7F7F" svg:stroke-width="0.03528cm"/>
    </style:style>
    <style:style style:family="paragraph" style:name="P86">
      <style:paragraph-properties/>
      <style:text-properties/>
    </style:style>
    <style:style style:family="presentation" style:name="pr15">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87">
      <style:paragraph-properties/>
      <style:text-properties/>
    </style:style>
    <style:style style:family="paragraph" style:name="P88">
      <style:paragraph-properties fo:line-height="90%" fo:text-align="left" fo:margin-left="0pt" fo:margin-right="0pt" fo:text-indent="0pt" fo:margin-top="0pt" fo:margin-bottom="0pt"/>
      <style:text-properties/>
    </style:style>
    <style:style style:family="text" style:name="T101">
      <style:text-properties fo:text-transform="uppercase" fo:color="#043962" style:text-line-through-type="none" fo:font-family="Arial Black" style:font-family-complex="Arial Black" fo:font-size="24pt" style:font-size-asian="24pt" style:font-size-complex="24pt" fo:letter-spacing="0pt" fo:language="fr" fo:country="FR" style:text-underline-type="none" fo:font-weight="bold"/>
    </style:style>
    <style:style style:family="presentation" style:name="pr16">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89">
      <style:paragraph-properties/>
      <style:text-properties/>
    </style:style>
    <style:style style:family="paragraph" style:name="P90">
      <style:paragraph-properties/>
      <style:text-properties/>
    </style:style>
    <style:style style:family="text" style:name="T102">
      <style:text-properties fo:color="#000000" style:text-line-through-type="none" fo:font-family="Arial" style:font-family-complex="Arial" fo:font-size="14pt" style:font-size-asian="14pt" style:font-size-complex="14pt" fo:letter-spacing="0pt" fo:language="fr" fo:country="FR" style:text-underline-type="none"/>
    </style:style>
    <style:style style:family="text" style:name="T103">
      <style:text-properties fo:color="#000000" style:text-line-through-type="none" fo:font-family="Arial" style:font-family-complex="Arial" fo:font-size="14pt" style:font-size-asian="14pt" style:font-size-complex="14pt" fo:letter-spacing="0pt" fo:language="fr" fo:country="FR" style:text-underline-type="none"/>
    </style:style>
    <style:style style:family="text" style:name="T104">
      <style:text-properties fo:color="#000000" style:text-line-through-type="none" fo:font-family="Arial" style:font-family-complex="Arial" fo:font-size="14pt" style:font-size-asian="14pt" style:font-size-complex="14pt" fo:letter-spacing="0pt" fo:language="fr" fo:country="FR" style:text-underline-type="none"/>
    </style:style>
    <style:style style:family="graphic" style:name="gr38">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91">
      <style:paragraph-properties fo:line-height="90%" fo:text-align="justify" fo:margin-top="0pt" fo:margin-bottom="4.98pt"/>
      <style:text-properties/>
    </style:style>
    <style:style style:family="text" style:name="T105">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39">
      <style:graphic-properties draw:fill="none" draw:auto-grow-height="false" draw:auto-grow-width="false" draw:stroke="solid" svg:stroke-color="#E6E6E9" svg:stroke-width="0.05291cm" style:wrap="run-through"/>
    </style:style>
    <style:style style:family="paragraph" style:name="P92">
      <style:paragraph-properties/>
      <style:text-properties/>
    </style:style>
    <style:style style:family="graphic" style:name="gr40">
      <style:graphic-properties draw:fill="gradient" draw:fill-gradient-name="Gradient8" draw:textarea-vertical-align="middle" draw:auto-grow-height="false" draw:auto-grow-width="false" draw:stroke="none" style:wrap="run-through" fo:padding-top="5.669pt" fo:padding-bottom="5.669pt" fo:padding-left="7.2pt" fo:padding-right="7.2pt" fo:background-color="transparent"/>
    </style:style>
    <style:style style:family="paragraph" style:name="P93">
      <style:paragraph-properties fo:line-height="90%" fo:text-align="center" fo:margin-left="0pt" fo:margin-right="0pt" fo:text-indent="0pt" fo:margin-top="0pt" fo:margin-bottom="0pt"/>
      <style:text-properties/>
    </style:style>
    <style:style style:family="text" style:name="T106">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41">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94">
      <style:paragraph-properties fo:line-height="90%" fo:text-align="justify" fo:margin-left="0pt" fo:margin-right="0pt" fo:text-indent="0pt" fo:margin-top="0pt" fo:margin-bottom="0pt"/>
      <style:text-properties/>
    </style:style>
    <style:style style:family="text" style:name="T107">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paragraph" style:name="P95">
      <style:paragraph-properties fo:line-height="90%" fo:text-align="justify" fo:margin-left="0pt" fo:margin-right="0pt" fo:text-indent="0pt" fo:margin-top="0pt" fo:margin-bottom="0pt"/>
      <style:text-properties/>
    </style:style>
    <style:style style:family="paragraph" style:name="P96">
      <style:paragraph-properties fo:line-height="90%" fo:text-align="justify" fo:margin-left="0pt" fo:margin-right="0pt" fo:text-indent="0pt" fo:margin-top="0pt" fo:margin-bottom="0pt"/>
      <style:text-properties/>
    </style:style>
    <style:style style:family="text" style:name="T108">
      <style:text-properties fo:color="#043962" style:text-line-through-type="none" fo:font-family="Calibri" style:font-family-complex="Calibri" fo:font-size="8pt" style:font-size-asian="8pt" style:font-size-complex="8pt" fo:letter-spacing="0pt" fo:language="fr" fo:country="FR" style:text-underline-type="none"/>
    </style:style>
    <style:style style:family="text" style:name="T109">
      <style:text-properties fo:color="#043962" style:text-line-through-type="none" fo:font-family="Calibri" style:font-family-complex="Calibri" fo:font-size="8pt" style:font-size-asian="8pt" style:font-size-complex="8pt" fo:letter-spacing="0pt" fo:language="en" fo:country="US" style:text-underline-type="none"/>
    </style:style>
    <style:style style:family="graphic" style:name="gr42">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97">
      <style:paragraph-properties fo:line-height="90%" fo:text-align="justify" fo:margin-top="0pt" fo:margin-bottom="4.97pt"/>
      <style:text-properties/>
    </style:style>
    <style:style style:family="text" style:name="T110">
      <style:text-properties fo:color="#063C67" style:text-line-through-type="none" fo:font-family="Calibri" style:font-family-complex="Calibri" fo:font-size="7pt" style:font-size-asian="7pt" style:font-size-complex="7pt" fo:letter-spacing="0pt" fo:language="en" fo:country="US" style:text-underline-type="none"/>
    </style:style>
    <style:style style:family="text" style:name="T111">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43">
      <style:graphic-properties draw:fill="gradient" draw:fill-gradient-name="Gradient9" draw:textarea-vertical-align="middle" draw:auto-grow-height="false" draw:auto-grow-width="false" draw:stroke="none" style:wrap="run-through" fo:padding-top="5.669pt" fo:padding-bottom="5.669pt" fo:padding-left="7.2pt" fo:padding-right="7.2pt" fo:background-color="transparent"/>
    </style:style>
    <style:style style:family="paragraph" style:name="P98">
      <style:paragraph-properties fo:line-height="90%" fo:text-align="center" fo:margin-left="0pt" fo:margin-right="0pt" fo:text-indent="0pt" fo:margin-top="0pt" fo:margin-bottom="0pt"/>
      <style:text-properties/>
    </style:style>
    <style:style style:family="text" style:name="T112">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44">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99">
      <style:paragraph-properties fo:line-height="90%" fo:text-align="justify" fo:margin-top="0pt" fo:margin-bottom="4.97pt"/>
      <style:text-properties/>
    </style:style>
    <style:style style:family="text" style:name="T113">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45">
      <style:graphic-properties draw:fill="gradient" draw:fill-gradient-name="Gradient10" draw:textarea-vertical-align="middle" draw:auto-grow-height="false" draw:auto-grow-width="false" draw:stroke="none" style:wrap="run-through" fo:padding-top="5.669pt" fo:padding-bottom="5.669pt" fo:padding-left="7.2pt" fo:padding-right="7.2pt" fo:background-color="transparent"/>
    </style:style>
    <style:style style:family="paragraph" style:name="P100">
      <style:paragraph-properties fo:line-height="90%" fo:text-align="center" fo:margin-left="0pt" fo:margin-right="0pt" fo:text-indent="0pt" fo:margin-top="0pt" fo:margin-bottom="0pt"/>
      <style:text-properties/>
    </style:style>
    <style:style style:family="text" style:name="T114">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46">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01">
      <style:paragraph-properties fo:line-height="90%" fo:text-align="left" fo:margin-top="0pt" fo:margin-bottom="4.97pt"/>
      <style:text-properties/>
    </style:style>
    <style:style style:family="text" style:name="T115">
      <style:text-properties fo:color="#063C67" style:text-line-through-type="none" fo:font-family="Calibri" style:font-family-complex="Calibri" fo:font-size="7pt" style:font-size-asian="7pt" style:font-size-complex="7pt" fo:letter-spacing="0pt" fo:language="en" fo:country="US" style:text-underline-type="none"/>
    </style:style>
    <style:style style:family="text" style:name="T116">
      <style:text-properties fo:color="#063C67" style:text-line-through-type="none" fo:font-family="Calibri" style:font-family-complex="Calibri" fo:font-size="7pt" style:font-size-asian="7pt" style:font-size-complex="7pt" fo:letter-spacing="0pt" fo:language="fr" fo:country="FR" style:text-underline-type="none"/>
    </style:style>
    <style:style style:family="text" style:name="T117">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47">
      <style:graphic-properties draw:fill="gradient" draw:fill-gradient-name="Gradient11" draw:textarea-vertical-align="middle" draw:auto-grow-height="false" draw:auto-grow-width="false" draw:stroke="none" style:wrap="run-through" fo:padding-top="5.669pt" fo:padding-bottom="5.669pt" fo:padding-left="7.2pt" fo:padding-right="7.2pt" fo:background-color="transparent"/>
    </style:style>
    <style:style style:family="paragraph" style:name="P102">
      <style:paragraph-properties fo:line-height="90%" fo:text-align="center" fo:margin-left="0pt" fo:margin-right="0pt" fo:text-indent="0pt" fo:margin-top="0pt" fo:margin-bottom="0pt"/>
      <style:text-properties/>
    </style:style>
    <style:style style:family="text" style:name="T118">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parent-style-name="Graphics" style:family="graphic" style:name="gr48">
      <style:graphic-properties draw:image-opacity="100%" style:repeat="stretch" draw:stroke="none" style:wrap="run-through" fo:background-color="transparent"/>
    </style:style>
    <style:style style:parent-style-name="Graphics" style:family="graphic" style:name="gr49">
      <style:graphic-properties draw:image-opacity="100%" style:repeat="stretch" draw:stroke="none" style:wrap="run-through" fo:background-color="transparent"/>
    </style:style>
    <style:style style:family="graphic" style:name="gr50">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03">
      <style:paragraph-properties fo:line-height="90%" fo:text-align="justify" fo:margin-left="0pt" fo:margin-right="0pt" fo:text-indent="0pt" fo:margin-top="0pt" fo:margin-bottom="0pt"/>
      <style:text-properties/>
    </style:style>
    <style:style style:family="text" style:name="T119">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text" style:name="T120">
      <style:text-properties fo:color="#1D93C9" style:text-line-through-type="none" fo:font-family="Calibri" style:font-family-complex="Calibri" fo:font-size="12pt" style:font-size-asian="12pt" style:font-size-complex="12pt" fo:letter-spacing="0pt" fo:language="fr" fo:country="FR" style:text-underline-type="none" fo:font-weight="bold"/>
    </style:style>
    <style:style style:family="paragraph" style:name="P104">
      <style:paragraph-properties fo:line-height="90%" fo:text-align="justify" fo:margin-left="0pt" fo:margin-right="0pt" fo:text-indent="0pt" fo:margin-top="0pt" fo:margin-bottom="0pt"/>
      <style:text-properties/>
    </style:style>
    <style:style style:family="paragraph" style:name="P105">
      <style:paragraph-properties fo:line-height="90%" fo:text-align="justify" fo:margin-left="0pt" fo:margin-right="0pt" fo:text-indent="0pt" fo:margin-top="0pt" fo:margin-bottom="0pt"/>
      <style:text-properties/>
    </style:style>
    <style:style style:family="text" style:name="T121">
      <style:text-properties fo:color="#043962" style:text-line-through-type="none" fo:font-family="Calibri" style:font-family-complex="Calibri" fo:font-size="8pt" style:font-size-asian="8pt" style:font-size-complex="8pt" fo:letter-spacing="0pt" fo:language="fr" fo:country="FR" style:text-underline-type="none"/>
    </style:style>
    <style:style style:family="text" style:name="T122">
      <style:text-properties fo:color="#043962" style:text-line-through-type="none" fo:font-family="Calibri" style:font-family-complex="Calibri" fo:font-size="8pt" style:font-size-asian="8pt" style:font-size-complex="8pt" fo:letter-spacing="0pt" fo:language="en" fo:country="US" style:text-underline-type="none"/>
    </style:style>
    <style:style style:family="graphic" style:name="gr51">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06">
      <style:paragraph-properties fo:line-height="90%" fo:text-align="justify" fo:margin-left="0pt" fo:margin-right="0pt" fo:text-indent="0pt" fo:margin-top="0pt" fo:margin-bottom="0pt"/>
      <style:text-properties/>
    </style:style>
    <style:style style:family="text" style:name="T123">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paragraph" style:name="P107">
      <style:paragraph-properties fo:line-height="90%" fo:text-align="justify" fo:margin-left="0pt" fo:margin-right="0pt" fo:text-indent="0pt" fo:margin-top="0pt" fo:margin-bottom="0pt"/>
      <style:text-properties/>
    </style:style>
    <style:style style:family="paragraph" style:name="P108">
      <style:paragraph-properties fo:line-height="90%" fo:text-align="justify" fo:margin-left="0pt" fo:margin-right="0pt" fo:text-indent="0pt" fo:margin-top="0pt" fo:margin-bottom="0pt"/>
      <style:text-properties/>
    </style:style>
    <style:style style:family="text" style:name="T124">
      <style:text-properties fo:color="#043962" style:text-line-through-type="none" fo:font-family="Calibri" style:font-family-complex="Calibri" fo:font-size="7pt" style:font-size-asian="7pt" style:font-size-complex="7pt" fo:letter-spacing="0pt" fo:language="fr" fo:country="FR" style:text-underline-type="none"/>
    </style:style>
    <style:style style:parent-style-name="Graphics" style:family="graphic" style:name="gr52">
      <style:graphic-properties style:repeat="stretch" style:wrap="run-through" fo:background-color="transparent"/>
    </style:style>
    <style:style style:parent-style-name="Graphics" style:family="graphic" style:name="gr53">
      <style:graphic-properties style:repeat="stretch" style:wrap="run-through" fo:background-color="transparent"/>
    </style:style>
    <style:style style:family="graphic" style:name="gr54">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109">
      <style:paragraph-properties fo:text-align="left"/>
      <style:text-properties/>
    </style:style>
    <style:style style:family="text" style:name="T125">
      <style:text-properties style:text-line-through-type="none" fo:font-size="6pt" style:font-size-asian="6pt" style:font-size-complex="6pt" fo:language="fr" fo:country="FR" fo:font-style="italic" style:text-underline-type="none"/>
    </style:style>
    <style:style style:family="graphic" style:name="gr55">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110">
      <style:paragraph-properties fo:text-align="left"/>
      <style:text-properties/>
    </style:style>
    <style:style style:family="text" style:name="T126">
      <style:text-properties fo:color="#FFFFFF" style:text-line-through-type="none" fo:font-size="6pt" style:font-size-asian="6pt" style:font-size-complex="6pt" fo:language="fr" fo:country="FR" fo:font-style="italic" style:text-underline-type="none"/>
    </style:style>
    <style:style style:family="drawing-page" style:name="dp10">
      <style:drawing-page-properties/>
    </style:style>
    <style:style style:family="presentation" style:name="pr17">
      <style:graphic-properties draw:fill="none" draw:textarea-vertical-align="top" draw:auto-grow-height="true" draw:fit-to-size="false" style:shrink-to-fit="false" draw:stroke="none" fo:wrap-option="no-wrap" style:wrap="run-through" fo:background-color="transparent"/>
    </style:style>
    <style:style style:family="paragraph" style:name="P111">
      <style:paragraph-properties/>
      <style:text-properties/>
    </style:style>
    <style:style style:family="paragraph" style:name="P112">
      <style:paragraph-properties/>
      <style:text-properties/>
    </style:style>
    <style:style style:family="presentation" style:name="pr18">
      <style:graphic-properties draw:fill="none" draw:textarea-vertical-align="top" draw:auto-grow-height="true" draw:fit-to-size="false" style:shrink-to-fit="false" draw:stroke="none" fo:wrap-option="no-wrap" style:wrap="run-through" fo:background-color="transparent"/>
    </style:style>
    <style:style style:family="paragraph" style:name="P113">
      <style:paragraph-properties/>
      <style:text-properties/>
    </style:style>
    <style:style style:family="paragraph" style:name="P114">
      <style:paragraph-properties/>
      <style:text-properties/>
    </style:style>
    <style:style style:family="presentation" style:name="pr19">
      <style:graphic-properties draw:fill="none" draw:textarea-vertical-align="top" draw:auto-grow-height="true" draw:fit-to-size="false" style:shrink-to-fit="false" draw:stroke="none" fo:wrap-option="no-wrap" style:wrap="run-through" fo:background-color="transparent"/>
    </style:style>
    <style:style style:family="paragraph" style:name="P115">
      <style:paragraph-properties/>
      <style:text-properties/>
    </style:style>
    <style:style style:family="paragraph" style:name="P116">
      <style:paragraph-properties/>
      <style:text-properties/>
    </style:style>
    <style:style style:family="text" style:name="T127">
      <style:text-properties/>
    </style:style>
    <style:style style:family="drawing-page" style:name="dp11">
      <style:drawing-page-properties draw:fill-color="#FFFFFF" draw:fill="solid"/>
    </style:style>
    <style:style style:family="graphic" style:name="gr56">
      <style:graphic-properties draw:fill="none" draw:auto-grow-height="false" draw:auto-grow-width="false" draw:stroke="dotted" svg:stroke-color="#7F7F7F" svg:stroke-width="0.03528cm"/>
    </style:style>
    <style:style style:family="paragraph" style:name="P117">
      <style:paragraph-properties/>
      <style:text-properties/>
    </style:style>
    <style:style style:family="presentation" style:name="pr20">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18">
      <style:paragraph-properties/>
      <style:text-properties/>
    </style:style>
    <style:style style:family="paragraph" style:name="P119">
      <style:paragraph-properties fo:line-height="90%" fo:text-align="left" fo:margin-left="0pt" fo:margin-right="0pt" fo:text-indent="0pt" fo:margin-top="0pt" fo:margin-bottom="0pt"/>
      <style:text-properties/>
    </style:style>
    <style:style style:family="text" style:name="T128">
      <style:text-properties fo:text-transform="uppercase" fo:color="#043962" style:text-line-through-type="none" fo:font-family="Arial Black" style:font-family-complex="Arial Black" fo:font-size="24pt" style:font-size-asian="24pt" style:font-size-complex="24pt" fo:letter-spacing="0pt" fo:language="fr" fo:country="FR" style:text-underline-type="none" fo:font-weight="bold"/>
    </style:style>
    <style:style style:family="presentation" style:name="pr21">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20">
      <style:paragraph-properties/>
      <style:text-properties/>
    </style:style>
    <style:style style:family="paragraph" style:name="P121">
      <style:paragraph-properties/>
      <style:text-properties/>
    </style:style>
    <style:style style:family="text" style:name="T129">
      <style:text-properties fo:color="#000000" style:text-line-through-type="none" fo:font-family="Arial" style:font-family-complex="Arial" fo:font-size="14pt" style:font-size-asian="14pt" style:font-size-complex="14pt" fo:letter-spacing="0pt" fo:language="fr" fo:country="FR" style:text-underline-type="none"/>
    </style:style>
    <style:style style:family="text" style:name="T130">
      <style:text-properties fo:color="#000000" style:text-line-through-type="none" fo:font-family="Arial" style:font-family-complex="Arial" fo:font-size="14pt" style:font-size-asian="14pt" style:font-size-complex="14pt" fo:letter-spacing="0pt" fo:language="fr" fo:country="FR" style:text-underline-type="none"/>
    </style:style>
    <style:style style:family="text" style:name="T131">
      <style:text-properties fo:color="#000000" style:text-line-through-type="none" fo:font-family="Arial" style:font-family-complex="Arial" fo:font-size="14pt" style:font-size-asian="14pt" style:font-size-complex="14pt" fo:letter-spacing="0pt" fo:language="fr" fo:country="FR" style:text-underline-type="none"/>
    </style:style>
    <style:style style:family="graphic" style:name="gr57">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22">
      <style:paragraph-properties fo:line-height="90%" fo:text-align="justify" fo:margin-top="0pt" fo:margin-bottom="4.98pt"/>
      <style:text-properties/>
    </style:style>
    <style:style style:family="text" style:name="T132">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58">
      <style:graphic-properties draw:fill="none" draw:auto-grow-height="false" draw:auto-grow-width="false" draw:stroke="solid" svg:stroke-color="#E6E6E9" svg:stroke-width="0.05291cm" style:wrap="run-through"/>
    </style:style>
    <style:style style:family="paragraph" style:name="P123">
      <style:paragraph-properties/>
      <style:text-properties/>
    </style:style>
    <style:style style:family="graphic" style:name="gr59">
      <style:graphic-properties draw:fill="gradient" draw:fill-gradient-name="Gradient12" draw:textarea-vertical-align="middle" draw:auto-grow-height="false" draw:auto-grow-width="false" draw:stroke="none" style:wrap="run-through" fo:padding-top="5.669pt" fo:padding-bottom="5.669pt" fo:padding-left="7.2pt" fo:padding-right="7.2pt" fo:background-color="transparent"/>
    </style:style>
    <style:style style:family="paragraph" style:name="P124">
      <style:paragraph-properties fo:line-height="90%" fo:text-align="center" fo:margin-left="0pt" fo:margin-right="0pt" fo:text-indent="0pt" fo:margin-top="0pt" fo:margin-bottom="0pt"/>
      <style:text-properties/>
    </style:style>
    <style:style style:family="text" style:name="T133">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60">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25">
      <style:paragraph-properties fo:line-height="90%" fo:text-align="justify" fo:margin-left="0pt" fo:margin-right="0pt" fo:text-indent="0pt" fo:margin-top="0pt" fo:margin-bottom="0pt"/>
      <style:text-properties/>
    </style:style>
    <style:style style:family="text" style:name="T134">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paragraph" style:name="P126">
      <style:paragraph-properties fo:line-height="90%" fo:text-align="justify" fo:margin-left="0pt" fo:margin-right="0pt" fo:text-indent="0pt" fo:margin-top="0pt" fo:margin-bottom="0pt"/>
      <style:text-properties/>
    </style:style>
    <style:style style:family="paragraph" style:name="P127">
      <style:paragraph-properties fo:line-height="90%" fo:text-align="justify" fo:margin-left="0pt" fo:margin-right="0pt" fo:text-indent="0pt" fo:margin-top="0pt" fo:margin-bottom="0pt"/>
      <style:text-properties/>
    </style:style>
    <style:style style:family="text" style:name="T135">
      <style:text-properties fo:color="#043962" style:text-line-through-type="none" fo:font-family="Calibri" style:font-family-complex="Calibri" fo:font-size="8pt" style:font-size-asian="8pt" style:font-size-complex="8pt" fo:letter-spacing="0pt" fo:language="fr" fo:country="FR" style:text-underline-type="none"/>
    </style:style>
    <style:style style:family="graphic" style:name="gr61">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28">
      <style:paragraph-properties fo:line-height="90%" fo:text-align="justify" fo:margin-top="0pt" fo:margin-bottom="4.97pt"/>
      <style:text-properties/>
    </style:style>
    <style:style style:family="text" style:name="T136">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62">
      <style:graphic-properties draw:fill="gradient" draw:fill-gradient-name="Gradient13" draw:textarea-vertical-align="middle" draw:auto-grow-height="false" draw:auto-grow-width="false" draw:stroke="none" style:wrap="run-through" fo:padding-top="5.669pt" fo:padding-bottom="5.669pt" fo:padding-left="7.2pt" fo:padding-right="7.2pt" fo:background-color="transparent"/>
    </style:style>
    <style:style style:family="paragraph" style:name="P129">
      <style:paragraph-properties fo:line-height="90%" fo:text-align="center" fo:margin-left="0pt" fo:margin-right="0pt" fo:text-indent="0pt" fo:margin-top="0pt" fo:margin-bottom="0pt"/>
      <style:text-properties/>
    </style:style>
    <style:style style:family="text" style:name="T137">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63">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30">
      <style:paragraph-properties fo:line-height="90%" fo:text-align="justify" fo:margin-top="0pt" fo:margin-bottom="4.97pt"/>
      <style:text-properties/>
    </style:style>
    <style:style style:family="text" style:name="T138">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64">
      <style:graphic-properties draw:fill="gradient" draw:fill-gradient-name="Gradient14" draw:textarea-vertical-align="middle" draw:auto-grow-height="false" draw:auto-grow-width="false" draw:stroke="none" style:wrap="run-through" fo:padding-top="5.669pt" fo:padding-bottom="5.669pt" fo:padding-left="7.2pt" fo:padding-right="7.2pt" fo:background-color="transparent"/>
    </style:style>
    <style:style style:family="paragraph" style:name="P131">
      <style:paragraph-properties fo:line-height="90%" fo:text-align="center" fo:margin-left="0pt" fo:margin-right="0pt" fo:text-indent="0pt" fo:margin-top="0pt" fo:margin-bottom="0pt"/>
      <style:text-properties/>
    </style:style>
    <style:style style:family="text" style:name="T139">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65">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32">
      <style:paragraph-properties fo:line-height="90%" fo:text-align="left" fo:margin-top="0pt" fo:margin-bottom="4.97pt"/>
      <style:text-properties/>
    </style:style>
    <style:style style:family="text" style:name="T140">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66">
      <style:graphic-properties draw:fill="gradient" draw:fill-gradient-name="Gradient15" draw:textarea-vertical-align="middle" draw:auto-grow-height="false" draw:auto-grow-width="false" draw:stroke="none" style:wrap="run-through" fo:padding-top="5.669pt" fo:padding-bottom="5.669pt" fo:padding-left="7.2pt" fo:padding-right="7.2pt" fo:background-color="transparent"/>
    </style:style>
    <style:style style:family="paragraph" style:name="P133">
      <style:paragraph-properties fo:line-height="90%" fo:text-align="center" fo:margin-left="0pt" fo:margin-right="0pt" fo:text-indent="0pt" fo:margin-top="0pt" fo:margin-bottom="0pt"/>
      <style:text-properties/>
    </style:style>
    <style:style style:family="text" style:name="T141">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parent-style-name="Graphics" style:family="graphic" style:name="gr67">
      <style:graphic-properties draw:image-opacity="100%" style:repeat="stretch" draw:stroke="none" style:wrap="run-through" fo:background-color="transparent"/>
    </style:style>
    <style:style style:parent-style-name="Graphics" style:family="graphic" style:name="gr68">
      <style:graphic-properties draw:image-opacity="100%" style:repeat="stretch" draw:stroke="none" style:wrap="run-through" fo:background-color="transparent"/>
    </style:style>
    <style:style style:family="graphic" style:name="gr69">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34">
      <style:paragraph-properties fo:line-height="90%" fo:text-align="justify" fo:margin-left="0pt" fo:margin-right="0pt" fo:text-indent="0pt" fo:margin-top="0pt" fo:margin-bottom="0pt"/>
      <style:text-properties/>
    </style:style>
    <style:style style:family="text" style:name="T142">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text" style:name="T143">
      <style:text-properties fo:color="#1D93C9" style:text-line-through-type="none" fo:font-family="Calibri" style:font-family-complex="Calibri" fo:font-size="12pt" style:font-size-asian="12pt" style:font-size-complex="12pt" fo:letter-spacing="0pt" fo:language="fr" fo:country="FR" style:text-underline-type="none" fo:font-weight="bold"/>
    </style:style>
    <style:style style:family="paragraph" style:name="P135">
      <style:paragraph-properties fo:line-height="90%" fo:text-align="justify" fo:margin-left="0pt" fo:margin-right="0pt" fo:text-indent="0pt" fo:margin-top="0pt" fo:margin-bottom="0pt"/>
      <style:text-properties/>
    </style:style>
    <style:style style:family="paragraph" style:name="P136">
      <style:paragraph-properties fo:line-height="90%" fo:text-align="justify" fo:margin-left="0pt" fo:margin-right="0pt" fo:text-indent="0pt" fo:margin-top="0pt" fo:margin-bottom="0pt"/>
      <style:text-properties/>
    </style:style>
    <style:style style:family="text" style:name="T144">
      <style:text-properties fo:color="#043962" style:text-line-through-type="none" fo:font-family="Calibri" style:font-family-complex="Calibri" fo:font-size="7pt" style:font-size-asian="7pt" style:font-size-complex="7pt" fo:letter-spacing="0pt" fo:language="en" fo:country="US" style:text-underline-type="none"/>
    </style:style>
    <style:style style:family="graphic" style:name="gr70">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37">
      <style:paragraph-properties fo:line-height="90%" fo:text-align="justify" fo:margin-left="0pt" fo:margin-right="0pt" fo:text-indent="0pt" fo:margin-top="0pt" fo:margin-bottom="0pt"/>
      <style:text-properties/>
    </style:style>
    <style:style style:family="text" style:name="T145">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paragraph" style:name="P138">
      <style:paragraph-properties fo:line-height="90%" fo:text-align="justify" fo:margin-left="0pt" fo:margin-right="0pt" fo:text-indent="0pt" fo:margin-top="0pt" fo:margin-bottom="0pt"/>
      <style:text-properties/>
    </style:style>
    <style:style style:family="paragraph" style:name="P139">
      <style:paragraph-properties fo:line-height="90%" fo:text-align="justify" fo:margin-left="0pt" fo:margin-right="0pt" fo:text-indent="0pt" fo:margin-top="0pt" fo:margin-bottom="0pt"/>
      <style:text-properties/>
    </style:style>
    <style:style style:family="text" style:name="T146">
      <style:text-properties fo:color="#043962" style:text-line-through-type="none" fo:font-family="Calibri" style:font-family-complex="Calibri" fo:font-size="8pt" style:font-size-asian="8pt" style:font-size-complex="8pt" fo:letter-spacing="0pt" fo:language="fr" fo:country="FR" style:text-underline-type="none"/>
    </style:style>
    <style:style style:parent-style-name="Graphics" style:family="graphic" style:name="gr71">
      <style:graphic-properties style:repeat="stretch" style:wrap="run-through" fo:background-color="transparent"/>
    </style:style>
    <style:style style:parent-style-name="Graphics" style:family="graphic" style:name="gr72">
      <style:graphic-properties style:repeat="stretch" style:wrap="run-through" fo:background-color="transparent"/>
    </style:style>
    <style:style style:family="graphic" style:name="gr73">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140">
      <style:paragraph-properties fo:text-align="left"/>
      <style:text-properties/>
    </style:style>
    <style:style style:family="text" style:name="T147">
      <style:text-properties style:text-line-through-type="none" fo:font-size="6pt" style:font-size-asian="6pt" style:font-size-complex="6pt" fo:language="fr" fo:country="FR" fo:font-style="italic" style:text-underline-type="none"/>
    </style:style>
    <style:style style:family="graphic" style:name="gr74">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141">
      <style:paragraph-properties fo:text-align="left"/>
      <style:text-properties/>
    </style:style>
    <style:style style:family="text" style:name="T148">
      <style:text-properties fo:color="#FFFFFF" style:text-line-through-type="none" fo:font-size="6pt" style:font-size-asian="6pt" style:font-size-complex="6pt" fo:language="fr" fo:country="FR" fo:font-style="italic" style:text-underline-type="none"/>
    </style:style>
    <style:style style:family="drawing-page" style:name="dp12">
      <style:drawing-page-properties/>
    </style:style>
    <style:style style:family="presentation" style:name="pr22">
      <style:graphic-properties draw:fill="none" draw:textarea-vertical-align="top" draw:auto-grow-height="true" draw:fit-to-size="false" style:shrink-to-fit="false" draw:stroke="none" fo:wrap-option="no-wrap" style:wrap="run-through" fo:background-color="transparent"/>
    </style:style>
    <style:style style:family="paragraph" style:name="P142">
      <style:paragraph-properties/>
      <style:text-properties/>
    </style:style>
    <style:style style:family="paragraph" style:name="P143">
      <style:paragraph-properties/>
      <style:text-properties/>
    </style:style>
    <style:style style:family="presentation" style:name="pr23">
      <style:graphic-properties draw:fill="none" draw:textarea-vertical-align="top" draw:auto-grow-height="true" draw:fit-to-size="false" style:shrink-to-fit="false" draw:stroke="none" fo:wrap-option="no-wrap" style:wrap="run-through" fo:background-color="transparent"/>
    </style:style>
    <style:style style:family="paragraph" style:name="P144">
      <style:paragraph-properties/>
      <style:text-properties/>
    </style:style>
    <style:style style:family="paragraph" style:name="P145">
      <style:paragraph-properties/>
      <style:text-properties/>
    </style:style>
    <style:style style:family="presentation" style:name="pr24">
      <style:graphic-properties draw:fill="none" draw:textarea-vertical-align="top" draw:auto-grow-height="true" draw:fit-to-size="false" style:shrink-to-fit="false" draw:stroke="none" fo:wrap-option="no-wrap" style:wrap="run-through" fo:background-color="transparent"/>
    </style:style>
    <style:style style:family="paragraph" style:name="P146">
      <style:paragraph-properties/>
      <style:text-properties/>
    </style:style>
    <style:style style:family="paragraph" style:name="P147">
      <style:paragraph-properties/>
      <style:text-properties/>
    </style:style>
    <style:style style:family="text" style:name="T149">
      <style:text-properties/>
    </style:style>
    <style:style style:family="drawing-page" style:name="dp13">
      <style:drawing-page-properties draw:fill-color="#FFFFFF" draw:fill="solid"/>
    </style:style>
    <style:style style:family="graphic" style:name="gr75">
      <style:graphic-properties draw:fill="none" draw:auto-grow-height="false" draw:auto-grow-width="false" draw:stroke="dotted" svg:stroke-color="#7F7F7F" svg:stroke-width="0.03528cm"/>
    </style:style>
    <style:style style:family="paragraph" style:name="P148">
      <style:paragraph-properties/>
      <style:text-properties/>
    </style:style>
    <style:style style:family="presentation" style:name="pr25">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49">
      <style:paragraph-properties/>
      <style:text-properties/>
    </style:style>
    <style:style style:family="paragraph" style:name="P150">
      <style:paragraph-properties fo:line-height="90%" fo:text-align="left" fo:margin-left="0pt" fo:margin-right="0pt" fo:text-indent="0pt" fo:margin-top="0pt" fo:margin-bottom="0pt"/>
      <style:text-properties/>
    </style:style>
    <style:style style:family="text" style:name="T150">
      <style:text-properties fo:text-transform="uppercase" fo:color="#043962" style:text-line-through-type="none" fo:font-family="Arial Black" style:font-family-complex="Arial Black" fo:font-size="24pt" style:font-size-asian="24pt" style:font-size-complex="24pt" fo:letter-spacing="0pt" fo:language="fr" fo:country="FR" style:text-underline-type="none" fo:font-weight="bold"/>
    </style:style>
    <style:style style:family="presentation" style:name="pr26">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51">
      <style:paragraph-properties/>
      <style:text-properties/>
    </style:style>
    <style:style style:family="paragraph" style:name="P152">
      <style:paragraph-properties/>
      <style:text-properties/>
    </style:style>
    <style:style style:family="text" style:name="T151">
      <style:text-properties fo:color="#000000" style:text-line-through-type="none" fo:font-family="Arial" style:font-family-complex="Arial" fo:font-size="14pt" style:font-size-asian="14pt" style:font-size-complex="14pt" fo:letter-spacing="0pt" fo:language="fr" fo:country="FR" style:text-underline-type="none"/>
    </style:style>
    <style:style style:family="text" style:name="T152">
      <style:text-properties fo:color="#000000" style:text-line-through-type="none" fo:font-family="Arial" style:font-family-complex="Arial" fo:font-size="14pt" style:font-size-asian="14pt" style:font-size-complex="14pt" fo:letter-spacing="0pt" fo:language="fr" fo:country="FR" style:text-underline-type="none"/>
    </style:style>
    <style:style style:family="text" style:name="T153">
      <style:text-properties fo:color="#000000" style:text-line-through-type="none" fo:font-family="Arial" style:font-family-complex="Arial" fo:font-size="14pt" style:font-size-asian="14pt" style:font-size-complex="14pt" fo:letter-spacing="0pt" fo:language="fr" fo:country="FR" style:text-underline-type="none"/>
    </style:style>
    <style:style style:family="graphic" style:name="gr76">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53">
      <style:paragraph-properties fo:line-height="90%" fo:text-align="justify" fo:margin-top="0pt" fo:margin-bottom="4.98pt"/>
      <style:text-properties/>
    </style:style>
    <style:style style:family="text" style:name="T154">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77">
      <style:graphic-properties draw:fill="none" draw:auto-grow-height="false" draw:auto-grow-width="false" draw:stroke="solid" svg:stroke-color="#E6E6E9" svg:stroke-width="0.05291cm" style:wrap="run-through"/>
    </style:style>
    <style:style style:family="paragraph" style:name="P154">
      <style:paragraph-properties/>
      <style:text-properties/>
    </style:style>
    <style:style style:family="graphic" style:name="gr78">
      <style:graphic-properties draw:fill="gradient" draw:fill-gradient-name="Gradient16" draw:textarea-vertical-align="middle" draw:auto-grow-height="false" draw:auto-grow-width="false" draw:stroke="none" style:wrap="run-through" fo:padding-top="5.669pt" fo:padding-bottom="5.669pt" fo:padding-left="7.2pt" fo:padding-right="7.2pt" fo:background-color="transparent"/>
    </style:style>
    <style:style style:family="paragraph" style:name="P155">
      <style:paragraph-properties fo:line-height="90%" fo:text-align="center" fo:margin-left="0pt" fo:margin-right="0pt" fo:text-indent="0pt" fo:margin-top="0pt" fo:margin-bottom="0pt"/>
      <style:text-properties/>
    </style:style>
    <style:style style:family="text" style:name="T155">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79">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56">
      <style:paragraph-properties fo:line-height="90%" fo:text-align="justify" fo:margin-left="0pt" fo:margin-right="0pt" fo:text-indent="0pt" fo:margin-top="0pt" fo:margin-bottom="0pt"/>
      <style:text-properties/>
    </style:style>
    <style:style style:family="text" style:name="T156">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paragraph" style:name="P157">
      <style:paragraph-properties fo:line-height="90%" fo:text-align="justify" fo:margin-left="0pt" fo:margin-right="0pt" fo:text-indent="0pt" fo:margin-top="0pt" fo:margin-bottom="0pt"/>
      <style:text-properties/>
    </style:style>
    <style:style style:family="paragraph" style:name="P158">
      <style:paragraph-properties fo:line-height="90%" fo:text-align="justify" fo:margin-left="0pt" fo:margin-right="0pt" fo:text-indent="0pt" fo:margin-top="0pt" fo:margin-bottom="0pt"/>
      <style:text-properties/>
    </style:style>
    <style:style style:family="text" style:name="T157">
      <style:text-properties fo:color="#043962" style:text-line-through-type="none" fo:font-family="Calibri" style:font-family-complex="Calibri" fo:font-size="8pt" style:font-size-asian="8pt" style:font-size-complex="8pt" fo:letter-spacing="0pt" fo:language="fr" fo:country="FR" style:text-underline-type="none"/>
    </style:style>
    <style:style style:family="graphic" style:name="gr80">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59">
      <style:paragraph-properties fo:line-height="90%" fo:text-align="justify" fo:margin-top="0pt" fo:margin-bottom="4.97pt"/>
      <style:text-properties/>
    </style:style>
    <style:style style:family="text" style:name="T158">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81">
      <style:graphic-properties draw:fill="gradient" draw:fill-gradient-name="Gradient17" draw:textarea-vertical-align="middle" draw:auto-grow-height="false" draw:auto-grow-width="false" draw:stroke="none" style:wrap="run-through" fo:padding-top="5.669pt" fo:padding-bottom="5.669pt" fo:padding-left="7.2pt" fo:padding-right="7.2pt" fo:background-color="transparent"/>
    </style:style>
    <style:style style:family="paragraph" style:name="P160">
      <style:paragraph-properties fo:line-height="90%" fo:text-align="center" fo:margin-left="0pt" fo:margin-right="0pt" fo:text-indent="0pt" fo:margin-top="0pt" fo:margin-bottom="0pt"/>
      <style:text-properties/>
    </style:style>
    <style:style style:family="text" style:name="T159">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82">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61">
      <style:paragraph-properties fo:line-height="90%" fo:text-align="justify" fo:margin-top="0pt" fo:margin-bottom="4.97pt"/>
      <style:text-properties/>
    </style:style>
    <style:style style:family="text" style:name="T160">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83">
      <style:graphic-properties draw:fill="gradient" draw:fill-gradient-name="Gradient18" draw:textarea-vertical-align="middle" draw:auto-grow-height="false" draw:auto-grow-width="false" draw:stroke="none" style:wrap="run-through" fo:padding-top="5.669pt" fo:padding-bottom="5.669pt" fo:padding-left="7.2pt" fo:padding-right="7.2pt" fo:background-color="transparent"/>
    </style:style>
    <style:style style:family="paragraph" style:name="P162">
      <style:paragraph-properties fo:line-height="90%" fo:text-align="center" fo:margin-left="0pt" fo:margin-right="0pt" fo:text-indent="0pt" fo:margin-top="0pt" fo:margin-bottom="0pt"/>
      <style:text-properties/>
    </style:style>
    <style:style style:family="text" style:name="T161">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84">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63">
      <style:paragraph-properties fo:line-height="90%" fo:text-align="left" fo:margin-top="0pt" fo:margin-bottom="4.97pt"/>
      <style:text-properties/>
    </style:style>
    <style:style style:family="text" style:name="T162">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85">
      <style:graphic-properties draw:fill="gradient" draw:fill-gradient-name="Gradient19" draw:textarea-vertical-align="middle" draw:auto-grow-height="false" draw:auto-grow-width="false" draw:stroke="none" style:wrap="run-through" fo:padding-top="5.669pt" fo:padding-bottom="5.669pt" fo:padding-left="7.2pt" fo:padding-right="7.2pt" fo:background-color="transparent"/>
    </style:style>
    <style:style style:family="paragraph" style:name="P164">
      <style:paragraph-properties fo:line-height="90%" fo:text-align="center" fo:margin-left="0pt" fo:margin-right="0pt" fo:text-indent="0pt" fo:margin-top="0pt" fo:margin-bottom="0pt"/>
      <style:text-properties/>
    </style:style>
    <style:style style:family="text" style:name="T163">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parent-style-name="Graphics" style:family="graphic" style:name="gr86">
      <style:graphic-properties draw:image-opacity="100%" style:repeat="stretch" draw:stroke="none" style:wrap="run-through" fo:background-color="transparent"/>
    </style:style>
    <style:style style:parent-style-name="Graphics" style:family="graphic" style:name="gr87">
      <style:graphic-properties draw:image-opacity="100%" style:repeat="stretch" draw:stroke="none" style:wrap="run-through" fo:background-color="transparent"/>
    </style:style>
    <style:style style:family="graphic" style:name="gr88">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65">
      <style:paragraph-properties fo:line-height="90%" fo:text-align="justify" fo:margin-left="0pt" fo:margin-right="0pt" fo:text-indent="0pt" fo:margin-top="0pt" fo:margin-bottom="0pt"/>
      <style:text-properties/>
    </style:style>
    <style:style style:family="text" style:name="T164">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text" style:name="T165">
      <style:text-properties fo:color="#1D93C9" style:text-line-through-type="none" fo:font-family="Calibri" style:font-family-complex="Calibri" fo:font-size="12pt" style:font-size-asian="12pt" style:font-size-complex="12pt" fo:letter-spacing="0pt" fo:language="fr" fo:country="FR" style:text-underline-type="none" fo:font-weight="bold"/>
    </style:style>
    <style:style style:family="paragraph" style:name="P166">
      <style:paragraph-properties fo:line-height="90%" fo:text-align="justify" fo:margin-left="0pt" fo:margin-right="0pt" fo:text-indent="0pt" fo:margin-top="0pt" fo:margin-bottom="0pt"/>
      <style:text-properties/>
    </style:style>
    <style:style style:family="paragraph" style:name="P167">
      <style:paragraph-properties fo:line-height="90%" fo:text-align="justify" fo:margin-left="0pt" fo:margin-right="0pt" fo:text-indent="0pt" fo:margin-top="0pt" fo:margin-bottom="0pt"/>
      <style:text-properties/>
    </style:style>
    <style:style style:family="text" style:name="T166">
      <style:text-properties fo:color="#043962" style:text-line-through-type="none" fo:font-family="Calibri" style:font-family-complex="Calibri" fo:font-size="8pt" style:font-size-asian="8pt" style:font-size-complex="8pt" fo:letter-spacing="0pt" fo:language="en" fo:country="US" style:text-underline-type="none"/>
    </style:style>
    <style:style style:family="graphic" style:name="gr89">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68">
      <style:paragraph-properties fo:line-height="90%" fo:text-align="justify" fo:margin-left="0pt" fo:margin-right="0pt" fo:text-indent="0pt" fo:margin-top="0pt" fo:margin-bottom="0pt"/>
      <style:text-properties/>
    </style:style>
    <style:style style:family="text" style:name="T167">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paragraph" style:name="P169">
      <style:paragraph-properties fo:line-height="90%" fo:text-align="justify" fo:margin-left="0pt" fo:margin-right="0pt" fo:text-indent="0pt" fo:margin-top="0pt" fo:margin-bottom="0pt"/>
      <style:text-properties/>
    </style:style>
    <style:style style:family="paragraph" style:name="P170">
      <style:paragraph-properties fo:line-height="90%" fo:text-align="justify" fo:margin-left="0pt" fo:margin-right="0pt" fo:text-indent="0pt" fo:margin-top="0pt" fo:margin-bottom="0pt"/>
      <style:text-properties/>
    </style:style>
    <style:style style:family="text" style:name="T168">
      <style:text-properties fo:color="#043962" style:text-line-through-type="none" fo:font-family="Calibri" style:font-family-complex="Calibri" fo:font-size="8pt" style:font-size-asian="8pt" style:font-size-complex="8pt" fo:letter-spacing="0pt" fo:language="fr" fo:country="FR" style:text-underline-type="none"/>
    </style:style>
    <style:style style:parent-style-name="Graphics" style:family="graphic" style:name="gr90">
      <style:graphic-properties style:repeat="stretch" style:wrap="run-through" fo:background-color="transparent"/>
    </style:style>
    <style:style style:parent-style-name="Graphics" style:family="graphic" style:name="gr91">
      <style:graphic-properties style:repeat="stretch" style:wrap="run-through" fo:background-color="transparent"/>
    </style:style>
    <style:style style:family="graphic" style:name="gr92">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171">
      <style:paragraph-properties fo:text-align="left"/>
      <style:text-properties/>
    </style:style>
    <style:style style:family="text" style:name="T169">
      <style:text-properties style:text-line-through-type="none" fo:font-size="6pt" style:font-size-asian="6pt" style:font-size-complex="6pt" fo:language="fr" fo:country="FR" fo:font-style="italic" style:text-underline-type="none"/>
    </style:style>
    <style:style style:family="graphic" style:name="gr93">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172">
      <style:paragraph-properties fo:text-align="left"/>
      <style:text-properties/>
    </style:style>
    <style:style style:family="text" style:name="T170">
      <style:text-properties fo:color="#FFFFFF" style:text-line-through-type="none" fo:font-size="6pt" style:font-size-asian="6pt" style:font-size-complex="6pt" fo:language="fr" fo:country="FR" fo:font-style="italic" style:text-underline-type="none"/>
    </style:style>
    <style:style style:family="drawing-page" style:name="dp14">
      <style:drawing-page-properties/>
    </style:style>
    <style:style style:family="presentation" style:name="pr27">
      <style:graphic-properties draw:fill="none" draw:textarea-vertical-align="top" draw:auto-grow-height="true" draw:fit-to-size="false" style:shrink-to-fit="false" draw:stroke="none" fo:wrap-option="no-wrap" style:wrap="run-through" fo:background-color="transparent"/>
    </style:style>
    <style:style style:family="paragraph" style:name="P173">
      <style:paragraph-properties/>
      <style:text-properties/>
    </style:style>
    <style:style style:family="paragraph" style:name="P174">
      <style:paragraph-properties/>
      <style:text-properties/>
    </style:style>
    <style:style style:family="presentation" style:name="pr28">
      <style:graphic-properties draw:fill="none" draw:textarea-vertical-align="top" draw:auto-grow-height="true" draw:fit-to-size="false" style:shrink-to-fit="false" draw:stroke="none" fo:wrap-option="no-wrap" style:wrap="run-through" fo:background-color="transparent"/>
    </style:style>
    <style:style style:family="paragraph" style:name="P175">
      <style:paragraph-properties/>
      <style:text-properties/>
    </style:style>
    <style:style style:family="paragraph" style:name="P176">
      <style:paragraph-properties/>
      <style:text-properties/>
    </style:style>
    <style:style style:family="presentation" style:name="pr29">
      <style:graphic-properties draw:fill="none" draw:textarea-vertical-align="top" draw:auto-grow-height="true" draw:fit-to-size="false" style:shrink-to-fit="false" draw:stroke="none" fo:wrap-option="no-wrap" style:wrap="run-through" fo:background-color="transparent"/>
    </style:style>
    <style:style style:family="paragraph" style:name="P177">
      <style:paragraph-properties/>
      <style:text-properties/>
    </style:style>
    <style:style style:family="paragraph" style:name="P178">
      <style:paragraph-properties/>
      <style:text-properties/>
    </style:style>
    <style:style style:family="text" style:name="T171">
      <style:text-properties/>
    </style:style>
    <style:style style:family="drawing-page" style:name="dp15">
      <style:drawing-page-properties draw:fill-color="#FFFFFF" draw:fill="solid"/>
    </style:style>
    <style:style style:family="graphic" style:name="gr94">
      <style:graphic-properties draw:fill="none" draw:auto-grow-height="false" draw:auto-grow-width="false" draw:stroke="dotted" svg:stroke-color="#7F7F7F" svg:stroke-width="0.03528cm"/>
    </style:style>
    <style:style style:family="paragraph" style:name="P179">
      <style:paragraph-properties/>
      <style:text-properties/>
    </style:style>
    <style:style style:family="presentation" style:name="pr30">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80">
      <style:paragraph-properties/>
      <style:text-properties/>
    </style:style>
    <style:style style:family="paragraph" style:name="P181">
      <style:paragraph-properties fo:line-height="90%" fo:text-align="left" fo:margin-left="0pt" fo:margin-right="0pt" fo:text-indent="0pt" fo:margin-top="0pt" fo:margin-bottom="0pt"/>
      <style:text-properties/>
    </style:style>
    <style:style style:family="text" style:name="T172">
      <style:text-properties fo:text-transform="uppercase" fo:color="#043962" style:text-line-through-type="none" fo:font-family="Arial Black" style:font-family-complex="Arial Black" fo:font-size="22pt" style:font-size-asian="22pt" style:font-size-complex="22pt" fo:letter-spacing="0pt" fo:language="fr" fo:country="FR" style:text-underline-type="none" fo:font-weight="bold"/>
    </style:style>
    <style:style style:family="presentation" style:name="pr31">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82">
      <style:paragraph-properties/>
      <style:text-properties/>
    </style:style>
    <style:style style:family="paragraph" style:name="P183">
      <style:paragraph-properties/>
      <style:text-properties/>
    </style:style>
    <style:style style:family="text" style:name="T173">
      <style:text-properties fo:color="#000000" style:text-line-through-type="none" fo:font-family="Arial" style:font-family-complex="Arial" fo:font-size="14pt" style:font-size-asian="14pt" style:font-size-complex="14pt" fo:letter-spacing="0pt" fo:language="fr" fo:country="FR" style:text-underline-type="none"/>
    </style:style>
    <style:style style:family="text" style:name="T174">
      <style:text-properties fo:color="#000000" style:text-line-through-type="none" fo:font-family="Arial" style:font-family-complex="Arial" fo:font-size="14pt" style:font-size-asian="14pt" style:font-size-complex="14pt" fo:letter-spacing="0pt" fo:language="fr" fo:country="FR" style:text-underline-type="none"/>
    </style:style>
    <style:style style:family="graphic" style:name="gr95">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84">
      <style:paragraph-properties fo:line-height="90%" fo:text-align="justify" fo:margin-top="0pt" fo:margin-bottom="4.98pt"/>
      <style:text-properties/>
    </style:style>
    <style:style style:family="text" style:name="T175">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96">
      <style:graphic-properties draw:fill="none" draw:auto-grow-height="false" draw:auto-grow-width="false" draw:stroke="solid" svg:stroke-color="#E6E6E9" svg:stroke-width="0.05291cm" style:wrap="run-through"/>
    </style:style>
    <style:style style:family="paragraph" style:name="P185">
      <style:paragraph-properties/>
      <style:text-properties/>
    </style:style>
    <style:style style:family="graphic" style:name="gr97">
      <style:graphic-properties draw:fill="gradient" draw:fill-gradient-name="Gradient20" draw:textarea-vertical-align="middle" draw:auto-grow-height="false" draw:auto-grow-width="false" draw:stroke="none" style:wrap="run-through" fo:padding-top="5.669pt" fo:padding-bottom="5.669pt" fo:padding-left="7.2pt" fo:padding-right="7.2pt" fo:background-color="transparent"/>
    </style:style>
    <style:style style:family="paragraph" style:name="P186">
      <style:paragraph-properties fo:line-height="90%" fo:text-align="center" fo:margin-left="0pt" fo:margin-right="0pt" fo:text-indent="0pt" fo:margin-top="0pt" fo:margin-bottom="0pt"/>
      <style:text-properties/>
    </style:style>
    <style:style style:family="text" style:name="T176">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98">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87">
      <style:paragraph-properties fo:line-height="90%" fo:text-align="justify" fo:margin-left="0pt" fo:margin-right="0pt" fo:text-indent="0pt" fo:margin-top="0pt" fo:margin-bottom="0pt"/>
      <style:text-properties/>
    </style:style>
    <style:style style:family="text" style:name="T177">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paragraph" style:name="P188">
      <style:paragraph-properties fo:line-height="90%" fo:text-align="justify" fo:margin-left="0pt" fo:margin-right="0pt" fo:text-indent="0pt" fo:margin-top="0pt" fo:margin-bottom="0pt"/>
      <style:text-properties/>
    </style:style>
    <style:style style:family="paragraph" style:name="P189">
      <style:paragraph-properties fo:line-height="90%" fo:text-align="justify" fo:margin-left="0pt" fo:margin-right="0pt" fo:text-indent="0pt" fo:margin-top="0pt" fo:margin-bottom="0pt"/>
      <style:text-properties/>
    </style:style>
    <style:style style:family="text" style:name="T178">
      <style:text-properties fo:color="#043962" style:text-line-through-type="none" fo:font-family="Calibri" style:font-family-complex="Calibri" fo:font-size="8pt" style:font-size-asian="8pt" style:font-size-complex="8pt" fo:letter-spacing="0pt" fo:language="fr" fo:country="FR" style:text-underline-type="none"/>
    </style:style>
    <style:style style:family="graphic" style:name="gr99">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90">
      <style:paragraph-properties fo:line-height="90%" fo:text-align="justify" fo:margin-top="0pt" fo:margin-bottom="4.97pt"/>
      <style:text-properties/>
    </style:style>
    <style:style style:family="text" style:name="T179">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100">
      <style:graphic-properties draw:fill="gradient" draw:fill-gradient-name="Gradient21" draw:textarea-vertical-align="middle" draw:auto-grow-height="false" draw:auto-grow-width="false" draw:stroke="none" style:wrap="run-through" fo:padding-top="5.669pt" fo:padding-bottom="5.669pt" fo:padding-left="7.2pt" fo:padding-right="7.2pt" fo:background-color="transparent"/>
    </style:style>
    <style:style style:family="paragraph" style:name="P191">
      <style:paragraph-properties fo:line-height="90%" fo:text-align="center" fo:margin-left="0pt" fo:margin-right="0pt" fo:text-indent="0pt" fo:margin-top="0pt" fo:margin-bottom="0pt"/>
      <style:text-properties/>
    </style:style>
    <style:style style:family="text" style:name="T180">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101">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92">
      <style:paragraph-properties fo:line-height="90%" fo:text-align="justify" fo:margin-top="0pt" fo:margin-bottom="4.97pt"/>
      <style:text-properties/>
    </style:style>
    <style:style style:family="text" style:name="T181">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102">
      <style:graphic-properties draw:fill="gradient" draw:fill-gradient-name="Gradient22" draw:textarea-vertical-align="middle" draw:auto-grow-height="false" draw:auto-grow-width="false" draw:stroke="none" style:wrap="run-through" fo:padding-top="5.669pt" fo:padding-bottom="5.669pt" fo:padding-left="7.2pt" fo:padding-right="7.2pt" fo:background-color="transparent"/>
    </style:style>
    <style:style style:family="paragraph" style:name="P193">
      <style:paragraph-properties fo:line-height="90%" fo:text-align="center" fo:margin-left="0pt" fo:margin-right="0pt" fo:text-indent="0pt" fo:margin-top="0pt" fo:margin-bottom="0pt"/>
      <style:text-properties/>
    </style:style>
    <style:style style:family="text" style:name="T182">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103">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94">
      <style:paragraph-properties fo:line-height="90%" fo:text-align="left" fo:margin-top="0pt" fo:margin-bottom="4.97pt"/>
      <style:text-properties/>
    </style:style>
    <style:style style:family="text" style:name="T183">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104">
      <style:graphic-properties draw:fill="gradient" draw:fill-gradient-name="Gradient23" draw:textarea-vertical-align="middle" draw:auto-grow-height="false" draw:auto-grow-width="false" draw:stroke="none" style:wrap="run-through" fo:padding-top="5.669pt" fo:padding-bottom="5.669pt" fo:padding-left="7.2pt" fo:padding-right="7.2pt" fo:background-color="transparent"/>
    </style:style>
    <style:style style:family="paragraph" style:name="P195">
      <style:paragraph-properties fo:line-height="90%" fo:text-align="center" fo:margin-left="0pt" fo:margin-right="0pt" fo:text-indent="0pt" fo:margin-top="0pt" fo:margin-bottom="0pt"/>
      <style:text-properties/>
    </style:style>
    <style:style style:family="text" style:name="T184">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parent-style-name="Graphics" style:family="graphic" style:name="gr105">
      <style:graphic-properties draw:image-opacity="100%" style:repeat="stretch" draw:stroke="none" style:wrap="run-through" fo:background-color="transparent"/>
    </style:style>
    <style:style style:parent-style-name="Graphics" style:family="graphic" style:name="gr106">
      <style:graphic-properties draw:image-opacity="100%" style:repeat="stretch" draw:stroke="none" style:wrap="run-through" fo:background-color="transparent"/>
    </style:style>
    <style:style style:family="graphic" style:name="gr107">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96">
      <style:paragraph-properties fo:line-height="90%" fo:text-align="justify" fo:margin-left="0pt" fo:margin-right="0pt" fo:text-indent="0pt" fo:margin-top="0pt" fo:margin-bottom="0pt"/>
      <style:text-properties/>
    </style:style>
    <style:style style:family="text" style:name="T185">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text" style:name="T186">
      <style:text-properties fo:color="#1D93C9" style:text-line-through-type="none" fo:font-family="Calibri" style:font-family-complex="Calibri" fo:font-size="12pt" style:font-size-asian="12pt" style:font-size-complex="12pt" fo:letter-spacing="0pt" fo:language="fr" fo:country="FR" style:text-underline-type="none" fo:font-weight="bold"/>
    </style:style>
    <style:style style:family="paragraph" style:name="P197">
      <style:paragraph-properties fo:line-height="90%" fo:text-align="justify" fo:margin-left="0pt" fo:margin-right="0pt" fo:text-indent="0pt" fo:margin-top="0pt" fo:margin-bottom="0pt"/>
      <style:text-properties/>
    </style:style>
    <style:style style:family="paragraph" style:name="P198">
      <style:paragraph-properties fo:line-height="90%" fo:text-align="justify" fo:margin-left="0pt" fo:margin-right="0pt" fo:text-indent="0pt" fo:margin-top="0pt" fo:margin-bottom="0pt"/>
      <style:text-properties/>
    </style:style>
    <style:style style:family="text" style:name="T187">
      <style:text-properties fo:color="#043962" style:text-line-through-type="none" fo:font-family="Calibri" style:font-family-complex="Calibri" fo:font-size="8pt" style:font-size-asian="8pt" style:font-size-complex="8pt" fo:letter-spacing="0pt" fo:language="en" fo:country="US" style:text-underline-type="none"/>
    </style:style>
    <style:style style:family="graphic" style:name="gr108">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99">
      <style:paragraph-properties fo:line-height="90%" fo:text-align="justify" fo:margin-left="0pt" fo:margin-right="0pt" fo:text-indent="0pt" fo:margin-top="0pt" fo:margin-bottom="0pt"/>
      <style:text-properties/>
    </style:style>
    <style:style style:family="text" style:name="T188">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paragraph" style:name="P200">
      <style:paragraph-properties fo:line-height="90%" fo:text-align="justify" fo:margin-left="0pt" fo:margin-right="0pt" fo:text-indent="0pt" fo:margin-top="0pt" fo:margin-bottom="0pt"/>
      <style:text-properties/>
    </style:style>
    <style:style style:family="paragraph" style:name="P201">
      <style:paragraph-properties fo:line-height="90%" fo:text-align="justify" fo:margin-left="0pt" fo:margin-right="0pt" fo:text-indent="0pt" fo:margin-top="0pt" fo:margin-bottom="0pt"/>
      <style:text-properties/>
    </style:style>
    <style:style style:family="text" style:name="T189">
      <style:text-properties fo:color="#043962" style:text-line-through-type="none" fo:font-family="Calibri" style:font-family-complex="Calibri" fo:font-size="8pt" style:font-size-asian="8pt" style:font-size-complex="8pt" fo:letter-spacing="0pt" fo:language="fr" fo:country="FR" style:text-underline-type="none"/>
    </style:style>
    <style:style style:parent-style-name="Graphics" style:family="graphic" style:name="gr109">
      <style:graphic-properties style:repeat="stretch" style:wrap="run-through" fo:background-color="transparent"/>
    </style:style>
    <style:style style:parent-style-name="Graphics" style:family="graphic" style:name="gr110">
      <style:graphic-properties style:repeat="stretch" style:wrap="run-through" fo:background-color="transparent"/>
    </style:style>
    <style:style style:family="graphic" style:name="gr111">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202">
      <style:paragraph-properties fo:text-align="left"/>
      <style:text-properties/>
    </style:style>
    <style:style style:family="text" style:name="T190">
      <style:text-properties style:text-line-through-type="none" fo:font-size="6pt" style:font-size-asian="6pt" style:font-size-complex="6pt" fo:language="fr" fo:country="FR" fo:font-style="italic" style:text-underline-type="none"/>
    </style:style>
    <style:style style:family="graphic" style:name="gr112">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203">
      <style:paragraph-properties fo:text-align="left"/>
      <style:text-properties/>
    </style:style>
    <style:style style:family="text" style:name="T191">
      <style:text-properties fo:color="#FFFFFF" style:text-line-through-type="none" fo:font-size="6pt" style:font-size-asian="6pt" style:font-size-complex="6pt" fo:language="fr" fo:country="FR" fo:font-style="italic" style:text-underline-type="none"/>
    </style:style>
    <style:style style:family="drawing-page" style:name="dp16">
      <style:drawing-page-properties/>
    </style:style>
    <style:style style:family="presentation" style:name="pr32">
      <style:graphic-properties draw:fill="none" draw:textarea-vertical-align="top" draw:auto-grow-height="true" draw:fit-to-size="false" style:shrink-to-fit="false" draw:stroke="none" fo:wrap-option="no-wrap" style:wrap="run-through" fo:background-color="transparent"/>
    </style:style>
    <style:style style:family="paragraph" style:name="P204">
      <style:paragraph-properties/>
      <style:text-properties/>
    </style:style>
    <style:style style:family="paragraph" style:name="P205">
      <style:paragraph-properties/>
      <style:text-properties/>
    </style:style>
    <style:style style:family="presentation" style:name="pr33">
      <style:graphic-properties draw:fill="none" draw:textarea-vertical-align="top" draw:auto-grow-height="true" draw:fit-to-size="false" style:shrink-to-fit="false" draw:stroke="none" fo:wrap-option="no-wrap" style:wrap="run-through" fo:background-color="transparent"/>
    </style:style>
    <style:style style:family="paragraph" style:name="P206">
      <style:paragraph-properties/>
      <style:text-properties/>
    </style:style>
    <style:style style:family="paragraph" style:name="P207">
      <style:paragraph-properties/>
      <style:text-properties/>
    </style:style>
    <style:style style:family="presentation" style:name="pr34">
      <style:graphic-properties draw:fill="none" draw:textarea-vertical-align="top" draw:auto-grow-height="true" draw:fit-to-size="false" style:shrink-to-fit="false" draw:stroke="none" fo:wrap-option="no-wrap" style:wrap="run-through" fo:background-color="transparent"/>
    </style:style>
    <style:style style:family="paragraph" style:name="P208">
      <style:paragraph-properties/>
      <style:text-properties/>
    </style:style>
    <style:style style:family="paragraph" style:name="P209">
      <style:paragraph-properties/>
      <style:text-properties/>
    </style:style>
    <style:style style:family="text" style:name="T192">
      <style:text-properties/>
    </style:style>
    <style:style style:family="drawing-page" style:name="dp17">
      <style:drawing-page-properties draw:fill-color="#FFFFFF" draw:fill="solid"/>
    </style:style>
    <style:style style:family="graphic" style:name="gr113">
      <style:graphic-properties draw:fill="none" draw:auto-grow-height="false" draw:auto-grow-width="false" draw:stroke="dotted" svg:stroke-color="#7F7F7F" svg:stroke-width="0.03528cm"/>
    </style:style>
    <style:style style:family="paragraph" style:name="P210">
      <style:paragraph-properties/>
      <style:text-properties/>
    </style:style>
    <style:style style:family="presentation" style:name="pr35">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11">
      <style:paragraph-properties/>
      <style:text-properties/>
    </style:style>
    <style:style style:family="paragraph" style:name="P212">
      <style:paragraph-properties/>
      <style:text-properties/>
    </style:style>
    <style:style style:family="text" style:name="T193">
      <style:text-properties fo:color="#000000" style:text-line-through-type="none" fo:font-family="Arial" style:font-family-complex="Arial" fo:font-size="14pt" style:font-size-asian="14pt" style:font-size-complex="14pt" fo:letter-spacing="0pt" fo:language="fr" fo:country="FR" style:text-underline-type="none"/>
    </style:style>
    <style:style style:family="text" style:name="T194">
      <style:text-properties fo:color="#000000" style:text-line-through-type="none" fo:font-family="Arial" style:font-family-complex="Arial" fo:font-size="14pt" style:font-size-asian="14pt" style:font-size-complex="14pt" fo:letter-spacing="0pt" fo:language="fr" fo:country="FR" style:text-underline-type="none"/>
    </style:style>
    <style:style style:family="text" style:name="T195">
      <style:text-properties fo:color="#000000" style:text-line-through-type="none" fo:font-family="Arial" style:font-family-complex="Arial" fo:font-size="14pt" style:font-size-asian="14pt" style:font-size-complex="14pt" fo:letter-spacing="0pt" fo:language="fr" fo:country="FR" style:text-underline-type="none"/>
    </style:style>
    <style:style style:family="graphic" style:name="gr114">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13">
      <style:paragraph-properties fo:line-height="90%" fo:text-align="justify" fo:margin-top="0pt" fo:margin-bottom="4.98pt"/>
      <style:text-properties/>
    </style:style>
    <style:style style:family="text" style:name="T196">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115">
      <style:graphic-properties draw:fill="none" draw:auto-grow-height="false" draw:auto-grow-width="false" draw:stroke="solid" svg:stroke-color="#E6E6E9" svg:stroke-width="0.05291cm" style:wrap="run-through"/>
    </style:style>
    <style:style style:family="paragraph" style:name="P214">
      <style:paragraph-properties/>
      <style:text-properties/>
    </style:style>
    <style:style style:family="graphic" style:name="gr116">
      <style:graphic-properties draw:fill="gradient" draw:fill-gradient-name="Gradient24" draw:textarea-vertical-align="middle" draw:auto-grow-height="false" draw:auto-grow-width="false" draw:stroke="none" style:wrap="run-through" fo:padding-top="5.669pt" fo:padding-bottom="5.669pt" fo:padding-left="7.2pt" fo:padding-right="7.2pt" fo:background-color="transparent"/>
    </style:style>
    <style:style style:family="paragraph" style:name="P215">
      <style:paragraph-properties fo:line-height="90%" fo:text-align="center" fo:margin-left="0pt" fo:margin-right="0pt" fo:text-indent="0pt" fo:margin-top="0pt" fo:margin-bottom="0pt"/>
      <style:text-properties/>
    </style:style>
    <style:style style:family="text" style:name="T197">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117">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16">
      <style:paragraph-properties fo:line-height="90%" fo:text-align="justify" fo:margin-left="0pt" fo:margin-right="0pt" fo:text-indent="0pt" fo:margin-top="0pt" fo:margin-bottom="0pt"/>
      <style:text-properties/>
    </style:style>
    <style:style style:family="text" style:name="T198">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paragraph" style:name="P217">
      <style:paragraph-properties fo:line-height="90%" fo:text-align="justify" fo:margin-left="0pt" fo:margin-right="0pt" fo:text-indent="0pt" fo:margin-top="0pt" fo:margin-bottom="0pt"/>
      <style:text-properties/>
    </style:style>
    <style:style style:family="paragraph" style:name="P218">
      <style:paragraph-properties fo:line-height="90%" fo:text-align="justify" fo:margin-left="0pt" fo:margin-right="0pt" fo:text-indent="0pt" fo:margin-top="0pt" fo:margin-bottom="0pt"/>
      <style:text-properties/>
    </style:style>
    <style:style style:family="text" style:name="T199">
      <style:text-properties fo:color="#043962" style:text-line-through-type="none" fo:font-family="Calibri" style:font-family-complex="Calibri" fo:font-size="8pt" style:font-size-asian="8pt" style:font-size-complex="8pt" fo:letter-spacing="0pt" fo:language="fr" fo:country="FR" style:text-underline-type="none"/>
    </style:style>
    <style:style style:family="graphic" style:name="gr118">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19">
      <style:paragraph-properties fo:line-height="90%" fo:text-align="justify" fo:margin-top="0pt" fo:margin-bottom="4.97pt"/>
      <style:text-properties/>
    </style:style>
    <style:style style:family="text" style:name="T200">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119">
      <style:graphic-properties draw:fill="gradient" draw:fill-gradient-name="Gradient25" draw:textarea-vertical-align="middle" draw:auto-grow-height="false" draw:auto-grow-width="false" draw:stroke="none" style:wrap="run-through" fo:padding-top="5.669pt" fo:padding-bottom="5.669pt" fo:padding-left="7.2pt" fo:padding-right="7.2pt" fo:background-color="transparent"/>
    </style:style>
    <style:style style:family="paragraph" style:name="P220">
      <style:paragraph-properties fo:line-height="90%" fo:text-align="center" fo:margin-left="0pt" fo:margin-right="0pt" fo:text-indent="0pt" fo:margin-top="0pt" fo:margin-bottom="0pt"/>
      <style:text-properties/>
    </style:style>
    <style:style style:family="text" style:name="T201">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120">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21">
      <style:paragraph-properties fo:line-height="90%" fo:text-align="justify" fo:margin-top="0pt" fo:margin-bottom="4.97pt"/>
      <style:text-properties/>
    </style:style>
    <style:style style:family="text" style:name="T202">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121">
      <style:graphic-properties draw:fill="gradient" draw:fill-gradient-name="Gradient26" draw:textarea-vertical-align="middle" draw:auto-grow-height="false" draw:auto-grow-width="false" draw:stroke="none" style:wrap="run-through" fo:padding-top="5.669pt" fo:padding-bottom="5.669pt" fo:padding-left="7.2pt" fo:padding-right="7.2pt" fo:background-color="transparent"/>
    </style:style>
    <style:style style:family="paragraph" style:name="P222">
      <style:paragraph-properties fo:line-height="90%" fo:text-align="center" fo:margin-left="0pt" fo:margin-right="0pt" fo:text-indent="0pt" fo:margin-top="0pt" fo:margin-bottom="0pt"/>
      <style:text-properties/>
    </style:style>
    <style:style style:family="text" style:name="T203">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122">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23">
      <style:paragraph-properties fo:line-height="90%" fo:text-align="left" fo:margin-top="0pt" fo:margin-bottom="4.97pt"/>
      <style:text-properties/>
    </style:style>
    <style:style style:family="text" style:name="T204">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123">
      <style:graphic-properties draw:fill="gradient" draw:fill-gradient-name="Gradient27" draw:textarea-vertical-align="middle" draw:auto-grow-height="false" draw:auto-grow-width="false" draw:stroke="none" style:wrap="run-through" fo:padding-top="5.669pt" fo:padding-bottom="5.669pt" fo:padding-left="7.2pt" fo:padding-right="7.2pt" fo:background-color="transparent"/>
    </style:style>
    <style:style style:family="paragraph" style:name="P224">
      <style:paragraph-properties fo:line-height="90%" fo:text-align="center" fo:margin-left="0pt" fo:margin-right="0pt" fo:text-indent="0pt" fo:margin-top="0pt" fo:margin-bottom="0pt"/>
      <style:text-properties/>
    </style:style>
    <style:style style:family="text" style:name="T205">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parent-style-name="Graphics" style:family="graphic" style:name="gr124">
      <style:graphic-properties draw:image-opacity="100%" style:repeat="stretch" draw:stroke="none" style:wrap="run-through" fo:background-color="transparent"/>
    </style:style>
    <style:style style:parent-style-name="Graphics" style:family="graphic" style:name="gr125">
      <style:graphic-properties draw:image-opacity="100%" style:repeat="stretch" draw:stroke="none" style:wrap="run-through" fo:background-color="transparent"/>
    </style:style>
    <style:style style:family="graphic" style:name="gr126">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25">
      <style:paragraph-properties fo:line-height="90%" fo:text-align="justify" fo:margin-left="0pt" fo:margin-right="0pt" fo:text-indent="0pt" fo:margin-top="0pt" fo:margin-bottom="0pt"/>
      <style:text-properties/>
    </style:style>
    <style:style style:family="text" style:name="T206">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text" style:name="T207">
      <style:text-properties fo:color="#1D93C9" style:text-line-through-type="none" fo:font-family="Calibri" style:font-family-complex="Calibri" fo:font-size="12pt" style:font-size-asian="12pt" style:font-size-complex="12pt" fo:letter-spacing="0pt" fo:language="fr" fo:country="FR" style:text-underline-type="none" fo:font-weight="bold"/>
    </style:style>
    <style:style style:family="paragraph" style:name="P226">
      <style:paragraph-properties fo:line-height="90%" fo:text-align="justify" fo:margin-left="0pt" fo:margin-right="0pt" fo:text-indent="0pt" fo:margin-top="0pt" fo:margin-bottom="0pt"/>
      <style:text-properties/>
    </style:style>
    <style:style style:family="paragraph" style:name="P227">
      <style:paragraph-properties fo:line-height="90%" fo:text-align="justify" fo:margin-left="0pt" fo:margin-right="0pt" fo:text-indent="0pt" fo:margin-top="0pt" fo:margin-bottom="0pt"/>
      <style:text-properties/>
    </style:style>
    <style:style style:family="text" style:name="T208">
      <style:text-properties fo:color="#043962" style:text-line-through-type="none" fo:font-family="Calibri" style:font-family-complex="Calibri" fo:font-size="8pt" style:font-size-asian="8pt" style:font-size-complex="8pt" fo:letter-spacing="0pt" fo:language="fr" fo:country="FR" style:text-underline-type="none"/>
    </style:style>
    <style:style style:family="text" style:name="T209">
      <style:text-properties fo:color="#043962" style:text-line-through-type="none" fo:font-family="Calibri" style:font-family-complex="Calibri" fo:font-size="8pt" style:font-size-asian="8pt" style:font-size-complex="8pt" fo:letter-spacing="0pt" fo:language="en" fo:country="US" style:text-underline-type="none"/>
    </style:style>
    <style:style style:family="text" style:name="T210">
      <style:text-properties fo:color="#043962" style:text-line-through-type="none" fo:font-family="Calibri" style:font-family-complex="Calibri" fo:font-size="8pt" style:font-size-asian="8pt" style:font-size-complex="8pt" fo:letter-spacing="0pt" fo:language="fr" fo:country="FR" style:text-underline-type="none"/>
    </style:style>
    <style:style style:family="text" style:name="T211">
      <style:text-properties fo:color="#043962" style:text-line-through-type="none" fo:font-family="Calibri" style:font-family-complex="Calibri" fo:font-size="8pt" style:font-size-asian="8pt" style:font-size-complex="8pt" fo:letter-spacing="0pt" fo:language="en" fo:country="US" style:text-underline-type="none"/>
    </style:style>
    <style:style style:family="graphic" style:name="gr127">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28">
      <style:paragraph-properties fo:line-height="90%" fo:text-align="justify" fo:margin-left="0pt" fo:margin-right="0pt" fo:text-indent="0pt" fo:margin-top="0pt" fo:margin-bottom="0pt"/>
      <style:text-properties/>
    </style:style>
    <style:style style:family="text" style:name="T212">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paragraph" style:name="P229">
      <style:paragraph-properties fo:line-height="90%" fo:text-align="justify" fo:margin-left="0pt" fo:margin-right="0pt" fo:text-indent="0pt" fo:margin-top="0pt" fo:margin-bottom="0pt"/>
      <style:text-properties/>
    </style:style>
    <style:style style:family="paragraph" style:name="P230">
      <style:paragraph-properties fo:line-height="90%" fo:text-align="justify" fo:margin-left="0pt" fo:margin-right="0pt" fo:text-indent="0pt" fo:margin-top="0pt" fo:margin-bottom="0pt"/>
      <style:text-properties/>
    </style:style>
    <style:style style:family="text" style:name="T213">
      <style:text-properties fo:color="#043962" style:text-line-through-type="none" fo:font-family="Calibri" style:font-family-complex="Calibri" fo:font-size="8pt" style:font-size-asian="8pt" style:font-size-complex="8pt" fo:letter-spacing="0pt" fo:language="fr" fo:country="FR" style:text-underline-type="none"/>
    </style:style>
    <style:style style:family="text" style:name="T214">
      <style:text-properties fo:color="#043962" style:text-line-through-type="none" fo:font-family="Calibri" style:font-family-complex="Calibri" fo:font-size="8pt" style:font-size-asian="8pt" style:font-size-complex="8pt" fo:letter-spacing="0pt" fo:language="fr" fo:country="FR" style:text-underline-type="none"/>
    </style:style>
    <style:style style:family="graphic" style:name="gr128">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31">
      <style:paragraph-properties fo:line-height="90%" fo:text-align="left" fo:margin-left="0pt" fo:margin-right="0pt" fo:text-indent="0pt" fo:margin-top="0pt" fo:margin-bottom="0pt"/>
      <style:text-properties/>
    </style:style>
    <style:style style:family="text" style:name="T215">
      <style:text-properties fo:text-transform="uppercase" fo:color="#043962" style:text-line-through-type="none" fo:font-family="Arial Black" style:font-family-complex="Arial Black" fo:font-size="24pt" style:font-size-asian="24pt" style:font-size-complex="24pt" fo:letter-spacing="0pt" fo:language="fr" fo:country="FR" style:text-underline-type="none" fo:font-weight="bold"/>
    </style:style>
    <style:style style:parent-style-name="Graphics" style:family="graphic" style:name="gr129">
      <style:graphic-properties style:repeat="stretch" style:wrap="run-through" fo:background-color="transparent"/>
    </style:style>
    <style:style style:parent-style-name="Graphics" style:family="graphic" style:name="gr130">
      <style:graphic-properties style:repeat="stretch" style:wrap="run-through" fo:background-color="transparent"/>
    </style:style>
    <style:style style:family="graphic" style:name="gr131">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232">
      <style:paragraph-properties fo:text-align="left"/>
      <style:text-properties/>
    </style:style>
    <style:style style:family="text" style:name="T216">
      <style:text-properties style:text-line-through-type="none" fo:font-size="6pt" style:font-size-asian="6pt" style:font-size-complex="6pt" fo:language="fr" fo:country="FR" fo:font-style="italic" style:text-underline-type="none"/>
    </style:style>
    <style:style style:family="graphic" style:name="gr132">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233">
      <style:paragraph-properties fo:text-align="left"/>
      <style:text-properties/>
    </style:style>
    <style:style style:family="text" style:name="T217">
      <style:text-properties fo:color="#FFFFFF" style:text-line-through-type="none" fo:font-size="6pt" style:font-size-asian="6pt" style:font-size-complex="6pt" fo:language="fr" fo:country="FR" fo:font-style="italic" style:text-underline-type="none"/>
    </style:style>
    <style:style style:family="drawing-page" style:name="dp18">
      <style:drawing-page-properties/>
    </style:style>
    <style:style style:family="presentation" style:name="pr36">
      <style:graphic-properties draw:fill="none" draw:textarea-vertical-align="top" draw:auto-grow-height="true" draw:fit-to-size="false" style:shrink-to-fit="false" draw:stroke="none" fo:wrap-option="no-wrap" style:wrap="run-through" fo:background-color="transparent"/>
    </style:style>
    <style:style style:family="paragraph" style:name="P234">
      <style:paragraph-properties/>
      <style:text-properties/>
    </style:style>
    <style:style style:family="paragraph" style:name="P235">
      <style:paragraph-properties/>
      <style:text-properties/>
    </style:style>
    <style:style style:family="presentation" style:name="pr37">
      <style:graphic-properties draw:fill="none" draw:textarea-vertical-align="top" draw:auto-grow-height="true" draw:fit-to-size="false" style:shrink-to-fit="false" draw:stroke="none" fo:wrap-option="no-wrap" style:wrap="run-through" fo:background-color="transparent"/>
    </style:style>
    <style:style style:family="paragraph" style:name="P236">
      <style:paragraph-properties/>
      <style:text-properties/>
    </style:style>
    <style:style style:family="paragraph" style:name="P237">
      <style:paragraph-properties/>
      <style:text-properties/>
    </style:style>
    <style:style style:family="presentation" style:name="pr38">
      <style:graphic-properties draw:fill="none" draw:textarea-vertical-align="top" draw:auto-grow-height="true" draw:fit-to-size="false" style:shrink-to-fit="false" draw:stroke="none" fo:wrap-option="no-wrap" style:wrap="run-through" fo:background-color="transparent"/>
    </style:style>
    <style:style style:family="paragraph" style:name="P238">
      <style:paragraph-properties/>
      <style:text-properties/>
    </style:style>
    <style:style style:family="paragraph" style:name="P239">
      <style:paragraph-properties/>
      <style:text-properties/>
    </style:style>
    <style:style style:family="text" style:name="T218">
      <style:text-properties/>
    </style:style>
    <style:style style:family="drawing-page" style:name="dp19">
      <style:drawing-page-properties draw:fill-color="#FFFFFF" draw:fill="solid"/>
    </style:style>
    <style:style style:family="graphic" style:name="gr133">
      <style:graphic-properties draw:fill="none" draw:auto-grow-height="false" draw:auto-grow-width="false" draw:stroke="dotted" svg:stroke-color="#7F7F7F" svg:stroke-width="0.03528cm"/>
    </style:style>
    <style:style style:family="paragraph" style:name="P240">
      <style:paragraph-properties/>
      <style:text-properties/>
    </style:style>
    <style:style style:family="presentation" style:name="pr39">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41">
      <style:paragraph-properties/>
      <style:text-properties/>
    </style:style>
    <style:style style:family="paragraph" style:name="P242">
      <style:paragraph-properties/>
      <style:text-properties/>
    </style:style>
    <style:style style:family="text" style:name="T219">
      <style:text-properties fo:color="#000000" style:text-line-through-type="none" fo:font-family="Arial" style:font-family-complex="Arial" fo:font-size="14pt" style:font-size-asian="14pt" style:font-size-complex="14pt" fo:letter-spacing="0pt" fo:language="fr" fo:country="FR" style:text-underline-type="none"/>
    </style:style>
    <style:style style:family="text" style:name="T220">
      <style:text-properties fo:color="#000000" style:text-line-through-type="none" fo:font-family="Arial" style:font-family-complex="Arial" fo:font-size="14pt" style:font-size-asian="14pt" style:font-size-complex="14pt" fo:letter-spacing="0pt" fo:language="fr" fo:country="FR" style:text-underline-type="none"/>
    </style:style>
    <style:style style:family="text" style:name="T221">
      <style:text-properties fo:color="#000000" style:text-line-through-type="none" fo:font-family="Arial" style:font-family-complex="Arial" fo:font-size="14pt" style:font-size-asian="14pt" style:font-size-complex="14pt" fo:letter-spacing="0pt" fo:language="fr" fo:country="FR" style:text-underline-type="none"/>
    </style:style>
    <style:style style:family="graphic" style:name="gr134">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43">
      <style:paragraph-properties fo:line-height="90%" fo:text-align="justify" fo:margin-top="0pt" fo:margin-bottom="4.98pt"/>
      <style:text-properties/>
    </style:style>
    <style:style style:family="text" style:name="T222">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135">
      <style:graphic-properties draw:fill="none" draw:auto-grow-height="false" draw:auto-grow-width="false" draw:stroke="solid" svg:stroke-color="#E6E6E9" svg:stroke-width="0.05291cm" style:wrap="run-through"/>
    </style:style>
    <style:style style:family="paragraph" style:name="P244">
      <style:paragraph-properties/>
      <style:text-properties/>
    </style:style>
    <style:style style:family="graphic" style:name="gr136">
      <style:graphic-properties draw:fill="gradient" draw:fill-gradient-name="Gradient28" draw:textarea-vertical-align="middle" draw:auto-grow-height="false" draw:auto-grow-width="false" draw:stroke="none" style:wrap="run-through" fo:padding-top="5.669pt" fo:padding-bottom="5.669pt" fo:padding-left="7.2pt" fo:padding-right="7.2pt" fo:background-color="transparent"/>
    </style:style>
    <style:style style:family="paragraph" style:name="P245">
      <style:paragraph-properties fo:line-height="90%" fo:text-align="center" fo:margin-left="0pt" fo:margin-right="0pt" fo:text-indent="0pt" fo:margin-top="0pt" fo:margin-bottom="0pt"/>
      <style:text-properties/>
    </style:style>
    <style:style style:family="text" style:name="T223">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137">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46">
      <style:paragraph-properties fo:line-height="90%" fo:text-align="justify" fo:margin-left="0pt" fo:margin-right="0pt" fo:text-indent="0pt" fo:margin-top="0pt" fo:margin-bottom="0pt"/>
      <style:text-properties/>
    </style:style>
    <style:style style:family="text" style:name="T224">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paragraph" style:name="P247">
      <style:paragraph-properties fo:line-height="90%" fo:text-align="justify" fo:margin-left="0pt" fo:margin-right="0pt" fo:text-indent="0pt" fo:margin-top="0pt" fo:margin-bottom="0pt"/>
      <style:text-properties/>
    </style:style>
    <style:style style:family="paragraph" style:name="P248">
      <style:paragraph-properties fo:line-height="90%" fo:text-align="justify" fo:margin-left="0pt" fo:margin-right="0pt" fo:text-indent="0pt" fo:margin-top="0pt" fo:margin-bottom="0pt"/>
      <style:text-properties/>
    </style:style>
    <style:style style:family="text" style:name="T225">
      <style:text-properties fo:color="#043962" style:text-line-through-type="none" fo:font-family="Calibri" style:font-family-complex="Calibri" fo:font-size="8pt" style:font-size-asian="8pt" style:font-size-complex="8pt" fo:letter-spacing="0pt" fo:language="fr" fo:country="FR" style:text-underline-type="none"/>
    </style:style>
    <style:style style:family="graphic" style:name="gr138">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49">
      <style:paragraph-properties fo:line-height="90%" fo:text-align="justify" fo:margin-top="0pt" fo:margin-bottom="4.97pt"/>
      <style:text-properties/>
    </style:style>
    <style:style style:family="text" style:name="T226">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139">
      <style:graphic-properties draw:fill="gradient" draw:fill-gradient-name="Gradient29" draw:textarea-vertical-align="middle" draw:auto-grow-height="false" draw:auto-grow-width="false" draw:stroke="none" style:wrap="run-through" fo:padding-top="5.669pt" fo:padding-bottom="5.669pt" fo:padding-left="7.2pt" fo:padding-right="7.2pt" fo:background-color="transparent"/>
    </style:style>
    <style:style style:family="paragraph" style:name="P250">
      <style:paragraph-properties fo:line-height="90%" fo:text-align="center" fo:margin-left="0pt" fo:margin-right="0pt" fo:text-indent="0pt" fo:margin-top="0pt" fo:margin-bottom="0pt"/>
      <style:text-properties/>
    </style:style>
    <style:style style:family="text" style:name="T227">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140">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51">
      <style:paragraph-properties fo:line-height="90%" fo:text-align="justify" fo:margin-top="0pt" fo:margin-bottom="4.97pt"/>
      <style:text-properties/>
    </style:style>
    <style:style style:family="text" style:name="T228">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141">
      <style:graphic-properties draw:fill="gradient" draw:fill-gradient-name="Gradient30" draw:textarea-vertical-align="middle" draw:auto-grow-height="false" draw:auto-grow-width="false" draw:stroke="none" style:wrap="run-through" fo:padding-top="5.669pt" fo:padding-bottom="5.669pt" fo:padding-left="7.2pt" fo:padding-right="7.2pt" fo:background-color="transparent"/>
    </style:style>
    <style:style style:family="paragraph" style:name="P252">
      <style:paragraph-properties fo:line-height="90%" fo:text-align="center" fo:margin-left="0pt" fo:margin-right="0pt" fo:text-indent="0pt" fo:margin-top="0pt" fo:margin-bottom="0pt"/>
      <style:text-properties/>
    </style:style>
    <style:style style:family="text" style:name="T229">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family="graphic" style:name="gr142">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53">
      <style:paragraph-properties fo:line-height="90%" fo:text-align="left" fo:margin-top="0pt" fo:margin-bottom="4.97pt"/>
      <style:text-properties/>
    </style:style>
    <style:style style:family="text" style:name="T230">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143">
      <style:graphic-properties draw:fill="gradient" draw:fill-gradient-name="Gradient31" draw:textarea-vertical-align="middle" draw:auto-grow-height="false" draw:auto-grow-width="false" draw:stroke="none" style:wrap="run-through" fo:padding-top="5.669pt" fo:padding-bottom="5.669pt" fo:padding-left="7.2pt" fo:padding-right="7.2pt" fo:background-color="transparent"/>
    </style:style>
    <style:style style:family="paragraph" style:name="P254">
      <style:paragraph-properties fo:line-height="90%" fo:text-align="center" fo:margin-left="0pt" fo:margin-right="0pt" fo:text-indent="0pt" fo:margin-top="0pt" fo:margin-bottom="0pt"/>
      <style:text-properties/>
    </style:style>
    <style:style style:family="text" style:name="T231">
      <style:text-properties fo:text-transform="uppercase" fo:color="#FFFFFF" style:text-line-through-type="none" fo:font-family="Calibri" style:font-family-complex="Calibri" fo:font-size="11pt" style:font-size-asian="11pt" style:font-size-complex="11pt" fo:letter-spacing="0pt" fo:language="fr" fo:country="FR" style:text-underline-type="none" fo:font-weight="bold"/>
    </style:style>
    <style:style style:parent-style-name="Graphics" style:family="graphic" style:name="gr144">
      <style:graphic-properties draw:image-opacity="100%" style:repeat="stretch" draw:stroke="none" style:wrap="run-through" fo:background-color="transparent"/>
    </style:style>
    <style:style style:parent-style-name="Graphics" style:family="graphic" style:name="gr145">
      <style:graphic-properties draw:image-opacity="100%" style:repeat="stretch" draw:stroke="none" style:wrap="run-through" fo:background-color="transparent"/>
    </style:style>
    <style:style style:family="graphic" style:name="gr146">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55">
      <style:paragraph-properties fo:line-height="90%" fo:text-align="justify" fo:margin-left="0pt" fo:margin-right="0pt" fo:text-indent="0pt" fo:margin-top="0pt" fo:margin-bottom="0pt"/>
      <style:text-properties/>
    </style:style>
    <style:style style:family="text" style:name="T232">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text" style:name="T233">
      <style:text-properties fo:color="#1D93C9" style:text-line-through-type="none" fo:font-family="Calibri" style:font-family-complex="Calibri" fo:font-size="12pt" style:font-size-asian="12pt" style:font-size-complex="12pt" fo:letter-spacing="0pt" fo:language="fr" fo:country="FR" style:text-underline-type="none" fo:font-weight="bold"/>
    </style:style>
    <style:style style:family="paragraph" style:name="P256">
      <style:paragraph-properties fo:line-height="90%" fo:text-align="justify" fo:margin-left="0pt" fo:margin-right="0pt" fo:text-indent="0pt" fo:margin-top="0pt" fo:margin-bottom="0pt"/>
      <style:text-properties/>
    </style:style>
    <style:style style:family="paragraph" style:name="P257">
      <style:paragraph-properties fo:line-height="90%" fo:text-align="justify" fo:margin-left="0pt" fo:margin-right="0pt" fo:text-indent="0pt" fo:margin-top="0pt" fo:margin-bottom="0pt"/>
      <style:text-properties/>
    </style:style>
    <style:style style:family="text" style:name="T234">
      <style:text-properties fo:color="#043962" style:text-line-through-type="none" fo:font-family="Calibri" style:font-family-complex="Calibri" fo:font-size="8pt" style:font-size-asian="8pt" style:font-size-complex="8pt" fo:letter-spacing="0pt" fo:language="fr" fo:country="FR" style:text-underline-type="none"/>
    </style:style>
    <style:style style:family="graphic" style:name="gr147">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58">
      <style:paragraph-properties fo:line-height="90%" fo:text-align="justify" fo:margin-left="0pt" fo:margin-right="0pt" fo:text-indent="0pt" fo:margin-top="0pt" fo:margin-bottom="0pt"/>
      <style:text-properties/>
    </style:style>
    <style:style style:family="text" style:name="T235">
      <style:text-properties fo:color="#1D93C9" style:text-line-through-type="none" fo:font-family="Calibri" style:font-family-complex="Calibri" fo:font-size="12pt" style:font-size-asian="12pt" style:font-size-complex="12pt" fo:letter-spacing="0pt" fo:language="en" fo:country="US" style:text-underline-type="none" fo:font-weight="bold"/>
    </style:style>
    <style:style style:family="paragraph" style:name="P259">
      <style:paragraph-properties fo:line-height="90%" fo:text-align="justify" fo:margin-left="0pt" fo:margin-right="0pt" fo:text-indent="0pt" fo:margin-top="0pt" fo:margin-bottom="0pt"/>
      <style:text-properties/>
    </style:style>
    <style:style style:family="paragraph" style:name="P260">
      <style:paragraph-properties fo:line-height="90%" fo:text-align="justify" fo:margin-left="0pt" fo:margin-right="0pt" fo:text-indent="0pt" fo:margin-top="0pt" fo:margin-bottom="0pt"/>
      <style:text-properties/>
    </style:style>
    <style:style style:family="text" style:name="T236">
      <style:text-properties fo:color="#043962" style:text-line-through-type="none" fo:font-family="Calibri" style:font-family-complex="Calibri" fo:font-size="8pt" style:font-size-asian="8pt" style:font-size-complex="8pt" fo:letter-spacing="0pt" fo:language="fr" fo:country="FR" style:text-underline-type="none"/>
    </style:style>
    <style:style style:family="text" style:name="T237">
      <style:text-properties fo:color="#043962" style:text-line-through-type="none" fo:font-family="Calibri" style:font-family-complex="Calibri" fo:font-size="8pt" style:font-size-asian="8pt" style:font-size-complex="8pt" fo:letter-spacing="0pt" fo:language="fr" fo:country="FR" style:text-underline-type="none"/>
    </style:style>
    <style:style style:family="graphic" style:name="gr148">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61">
      <style:paragraph-properties fo:line-height="90%" fo:text-align="left" fo:margin-left="0pt" fo:margin-right="0pt" fo:text-indent="0pt" fo:margin-top="0pt" fo:margin-bottom="0pt"/>
      <style:text-properties/>
    </style:style>
    <style:style style:family="text" style:name="T238">
      <style:text-properties fo:text-transform="uppercase" fo:color="#043962" style:text-line-through-type="none" fo:font-family="Arial Black" style:font-family-complex="Arial Black" fo:font-size="22pt" style:font-size-asian="22pt" style:font-size-complex="22pt" fo:letter-spacing="0pt" fo:language="fr" fo:country="FR" style:text-underline-type="none" fo:font-weight="bold"/>
    </style:style>
    <style:style style:parent-style-name="Graphics" style:family="graphic" style:name="gr149">
      <style:graphic-properties style:repeat="stretch" style:wrap="run-through" fo:background-color="transparent"/>
    </style:style>
    <style:style style:parent-style-name="Graphics" style:family="graphic" style:name="gr150">
      <style:graphic-properties style:repeat="stretch" style:wrap="run-through" fo:background-color="transparent"/>
    </style:style>
    <style:style style:family="graphic" style:name="gr151">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262">
      <style:paragraph-properties fo:text-align="left"/>
      <style:text-properties/>
    </style:style>
    <style:style style:family="text" style:name="T239">
      <style:text-properties style:text-line-through-type="none" fo:font-size="6pt" style:font-size-asian="6pt" style:font-size-complex="6pt" fo:language="fr" fo:country="FR" fo:font-style="italic" style:text-underline-type="none"/>
    </style:style>
    <style:style style:family="graphic" style:name="gr152">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263">
      <style:paragraph-properties fo:text-align="left"/>
      <style:text-properties/>
    </style:style>
    <style:style style:family="text" style:name="T240">
      <style:text-properties fo:color="#FFFFFF" style:text-line-through-type="none" fo:font-size="6pt" style:font-size-asian="6pt" style:font-size-complex="6pt" fo:language="fr" fo:country="FR" fo:font-style="italic" style:text-underline-type="none"/>
    </style:style>
    <style:style style:family="drawing-page" style:name="dp20">
      <style:drawing-page-properties/>
    </style:style>
    <style:style style:family="presentation" style:name="pr40">
      <style:graphic-properties draw:fill="none" draw:textarea-vertical-align="top" draw:auto-grow-height="true" draw:fit-to-size="false" style:shrink-to-fit="false" draw:stroke="none" fo:wrap-option="no-wrap" style:wrap="run-through" fo:background-color="transparent"/>
    </style:style>
    <style:style style:family="paragraph" style:name="P264">
      <style:paragraph-properties/>
      <style:text-properties/>
    </style:style>
    <style:style style:family="paragraph" style:name="P265">
      <style:paragraph-properties/>
      <style:text-properties/>
    </style:style>
    <style:style style:family="presentation" style:name="pr41">
      <style:graphic-properties draw:fill="none" draw:textarea-vertical-align="top" draw:auto-grow-height="true" draw:fit-to-size="false" style:shrink-to-fit="false" draw:stroke="none" fo:wrap-option="no-wrap" style:wrap="run-through" fo:background-color="transparent"/>
    </style:style>
    <style:style style:family="paragraph" style:name="P266">
      <style:paragraph-properties/>
      <style:text-properties/>
    </style:style>
    <style:style style:family="paragraph" style:name="P267">
      <style:paragraph-properties/>
      <style:text-properties/>
    </style:style>
    <style:style style:family="presentation" style:name="pr42">
      <style:graphic-properties draw:fill="none" draw:textarea-vertical-align="top" draw:auto-grow-height="true" draw:fit-to-size="false" style:shrink-to-fit="false" draw:stroke="none" fo:wrap-option="no-wrap" style:wrap="run-through" fo:background-color="transparent"/>
    </style:style>
    <style:style style:family="paragraph" style:name="P268">
      <style:paragraph-properties/>
      <style:text-properties/>
    </style:style>
    <style:style style:family="paragraph" style:name="P269">
      <style:paragraph-properties/>
      <style:text-properties/>
    </style:style>
    <style:style style:family="text" style:name="T241">
      <style:text-properties/>
    </style:style>
    <text:list-style style:name="L1"/>
    <text:list-style style:name="L2"/>
    <text:list-style style:name="L3"/>
    <text:list-style style:name="L4"/>
    <text:list-style style:name="L5"/>
    <text:list-style style:name="L6"/>
    <text:list-style style:name="L7"/>
    <text:list-style style:name="L8"/>
    <text:list-style style:name="L9"/>
    <text:list-style style:name="L10"/>
    <text:list-style style:name="L11"/>
    <text:list-style style:name="L12"/>
    <text:list-style style:name="L13"/>
    <text:list-style style:name="L14"/>
    <text:list-style style:name="L15"/>
    <text:list-style style:name="L16"/>
    <text:list-style style:name="L17"/>
    <text:list-style style:name="L18"/>
    <text:list-style style:name="L19"/>
    <text:list-style style:name="L20"/>
    <text:list-style style:name="L21"/>
    <text:list-style style:name="L22"/>
    <text:list-style style:name="L23"/>
    <text:list-style style:name="L24"/>
    <text:list-style style:name="L25"/>
    <text:list-style style:name="L26"/>
    <text:list-style style:name="L27"/>
    <text:list-style style:name="L28"/>
    <text:list-style style:name="L29"/>
    <text:list-style style:name="L30"/>
    <text:list-style style:name="L31"/>
    <text:list-style style:name="L32"/>
    <text:list-style style:name="L33"/>
    <text:list-style style:name="L34"/>
    <text:list-style style:name="L35"/>
    <text:list-style style:name="L36"/>
    <text:list-style style:name="L37"/>
    <text:list-style style:name="L38"/>
    <text:list-style style:name="L39"/>
    <text:list-style style:name="L40"/>
    <text:list-style style:name="L41"/>
    <text:list-style style:name="L42"/>
    <text:list-style style:name="L43"/>
    <text:list-style style:name="L44"/>
    <text:list-style style:name="L45"/>
    <text:list-style style:name="L46"/>
    <text:list-style style:name="L47"/>
    <text:list-style style:name="L48"/>
    <text:list-style style:name="L49"/>
    <text:list-style style:name="L50"/>
    <text:list-style style:name="L51"/>
    <text:list-style style:name="L52"/>
    <text:list-style style:name="L53"/>
    <text:list-style style:name="L54"/>
    <text:list-style style:name="L55"/>
    <text:list-style style:name="L56"/>
    <text:list-style style:name="L57"/>
    <text:list-style style:name="L58"/>
    <text:list-style style:name="L59"/>
    <text:list-style style:name="L60"/>
    <text:list-style style:name="L61"/>
    <text:list-style style:name="L62"/>
    <text:list-style style:name="L63"/>
    <text:list-style style:name="L64"/>
    <text:list-style style:name="L65"/>
    <text:list-style style:name="L66"/>
    <text:list-style style:name="L67"/>
    <text:list-style style:name="L68"/>
    <text:list-style style:name="L69"/>
    <text:list-style style:name="L70"/>
    <text:list-style style:name="L71"/>
    <text:list-style style:name="L72"/>
    <text:list-style style:name="L73"/>
    <text:list-style style:name="L74"/>
    <text:list-style style:name="L75"/>
    <text:list-style style:name="L76"/>
    <text:list-style style:name="L77"/>
    <text:list-style style:name="L78"/>
    <text:list-style style:name="L79"/>
    <text:list-style style:name="L80"/>
    <text:list-style style:name="L81"/>
    <text:list-style style:name="L82"/>
    <text:list-style style:name="L83"/>
    <text:list-style style:name="L84"/>
    <text:list-style style:name="L85"/>
    <text:list-style style:name="L86"/>
    <text:list-style style:name="L87"/>
    <text:list-style style:name="L88"/>
    <text:list-style style:name="L89"/>
    <text:list-style style:name="L90"/>
    <text:list-style style:name="L91"/>
    <text:list-style style:name="L92"/>
    <text:list-style style:name="L93"/>
    <text:list-style style:name="L94"/>
    <text:list-style style:name="L95"/>
    <text:list-style style:name="L96"/>
    <text:list-style style:name="L97"/>
    <text:list-style style:name="L98"/>
    <text:list-style style:name="L99"/>
    <text:list-style style:name="L100"/>
    <text:list-style style:name="L101"/>
    <text:list-style style:name="L102"/>
    <text:list-style style:name="L103"/>
    <text:list-style style:name="L104"/>
    <text:list-style style:name="L105"/>
    <text:list-style style:name="L106"/>
    <text:list-style style:name="L107"/>
    <text:list-style style:name="L108"/>
    <text:list-style style:name="L109"/>
    <text:list-style style:name="L110"/>
    <text:list-style style:name="L111"/>
    <text:list-style style:name="L112"/>
    <text:list-style style:name="L113"/>
    <text:list-style style:name="L114"/>
    <text:list-style style:name="L115"/>
    <text:list-style style:name="L116"/>
    <text:list-style style:name="L117"/>
    <text:list-style style:name="L118"/>
    <text:list-style style:name="L119"/>
    <text:list-style style:name="L120"/>
    <text:list-style style:name="L121"/>
    <text:list-style style:name="L122"/>
    <text:list-style style:name="L123"/>
    <text:list-style style:name="L124"/>
    <text:list-style style:name="L125"/>
    <text:list-style style:name="L126"/>
    <text:list-style style:name="L127"/>
    <text:list-style style:name="L128"/>
    <text:list-style style:name="L129"/>
    <text:list-style style:name="L130"/>
    <text:list-style style:name="L131"/>
    <text:list-style style:name="L132"/>
    <text:list-style style:name="L133"/>
    <text:list-style style:name="L134"/>
    <text:list-style style:name="L135"/>
    <text:list-style style:name="L136"/>
    <text:list-style style:name="L137"/>
    <text:list-style style:name="L138"/>
    <text:list-style style:name="L139"/>
    <text:list-style style:name="L140"/>
    <text:list-style style:name="L141"/>
    <text:list-style style:name="L142"/>
    <text:list-style style:name="L143"/>
    <text:list-style style:name="L144"/>
    <text:list-style style:name="L145"/>
    <text:list-style style:name="L146"/>
    <text:list-style style:name="L147"/>
    <text:list-style style:name="L148"/>
    <text:list-style style:name="L149"/>
    <text:list-style style:name="L150"/>
    <text:list-style style:name="L151"/>
    <text:list-style style:name="L152"/>
    <text:list-style style:name="L153"/>
    <text:list-style style:name="L154"/>
    <text:list-style style:name="L155"/>
    <text:list-style style:name="L156"/>
    <text:list-style style:name="L157"/>
  </office:automatic-styles>
  <office:body>
    <office:presentation>
      <draw:page draw:name="Slide1537" draw:style-name="dp5" draw:master-page-name="__________________________Master1-Layout1-cust-Cover-Double-Images" presentation:presentation-page-layout-name="AL1">
        <draw:frame xml:id="id7" draw:id="id7" draw:name="Espace réservé du texte 8" draw:text-style-name="P16" draw:layer="layout" presentation:style-name="pr5" presentation:class="outline" presentation:placeholder="true" svg:width="21.72cm" svg:height="0.7242cm" svg:x="0.7382cm" svg:y="0.3679cm">
          <draw:text-box fo:min-height="0.7242cm">
            <text:p text:style-name="P17"><text:span text:style-name="T1">AI TECH LEAD &amp; ArCHITECT</text:span></text:p>
          </draw:text-box>
        </draw:frame>
        <draw:frame xml:id="id8" draw:id="id8" draw:name="Espace réservé du texte 1" draw:text-style-name="P18" draw:layer="layout" presentation:style-name="pr6" presentation:class="outline" presentation:placeholder="true" svg:width="21.72cm" svg:height="0.4477cm" svg:x="0.7382cm" svg:y="1.222cm">
          <draw:text-box fo:min-height="0.4477cm">
            <text:p text:style-name="P19"><text:span text:style-name="T2">Core Mission:</text:span><text:span text:style-name="T3"> Bridging the gap between business ambition and production-grade AI systems.</text:span></text:p>
          </draw:text-box>
        </draw:frame>
        <draw:line xml:id="id9" draw:id="id9" draw:name="Прямая соединительная линия 9" draw:style-name="gr4" svg:x1="7.679cm" svg:x2="7.679cm" svg:y1="2.865cm" svg:y2="13.87cm">
          <text:p text:style-name="P20"><text:span/></text:p>
        </draw:line>
        <draw:frame xml:id="id10" draw:id="id10" draw:style-name="gr5" draw:transform="rotate(-81.681407248005371) translate(22.16cm,0.08307cm)" svg:width="3.254cm" svg:height="0.509cm">
          <draw:text-box fo:min-height="0.509cm">
            <text:p text:style-name="P21"><text:span text:style-name="T4">Fabien FURFARO (2026)</text:span></text:p>
          </draw:text-box>
        </draw:frame>
        <draw:frame xml:id="id11" draw:id="id11" draw:style-name="gr6" svg:width="6.323cm" svg:height="11.15cm" svg:x="8.909cm" svg:y="2.389cm">
          <draw:image xlink:href="Pictures/image2.png" xlink:type="simple" xlink:show="embed" xlink:actuate="onLoad"/>
        </draw:frame>
        <draw:frame xml:id="id12" draw:id="id12" draw:name="Titre 1" draw:style-name="gr7" svg:width="7.473cm" svg:height="1.698cm" svg:x="17.07cm" svg:y="2.053cm">
          <draw:text-box fo:min-height="1.698cm">
            <text:p text:style-name="P22"><text:span text:style-name="T5">Tech STACK</text:span></text:p>
            <text:p text:style-name="P23"><text:span text:style-name="T6">(CLOUD &amp; EDGE AGNOSTIC)</text:span></text:p>
          </draw:text-box>
        </draw:frame>
        <draw:frame xml:id="id13" draw:id="id13" draw:name="Titre 1" draw:style-name="gr8" svg:width="6.922cm" svg:height="4.42cm" svg:x="17.41cm" svg:y="3.947cm">
          <draw:text-box fo:min-height="4.42cm">
            <text:p text:style-name="P24"><text:span text:style-name="T7">CORE AI:</text:span><text:span text:style-name="T8"> LangGraph, LlamaIndex, Qdrant, vLLM, Ollama, Transformer (ViT), PyTorch</text:span><text:span text:style-name="T9">, Sklearn</text:span><text:span text:style-name="T10">.</text:span></text:p>
            <text:p text:style-name="P25"><text:span text:style-name="T11">DATA &amp; ETL:</text:span><text:span text:style-name="T12"> SQLAlchemy, Polars, DuckDB, </text:span><text:span text:style-name="T13">LanceDB, ArangoDB, </text:span><text:span text:style-name="T14">Mage-ai, PydanticAI, Unstructured.io.</text:span></text:p>
            <text:p text:style-name="P26"><text:span text:style-name="T15">ROBOTICS &amp; EDGE:</text:span><text:span text:style-name="T16"> Dora-rs, </text:span><text:span text:style-name="T17">CAN, </text:span><text:span text:style-name="T18">MQTT</text:span><text:span text:style-name="T19">.</text:span></text:p>
            <text:p text:style-name="P27"><text:span text:style-name="T20">SECURITY &amp; IAM:</text:span><text:span text:style-name="T21"> LiteLLM, HashiCorp Vault, Keycloak.</text:span></text:p>
            <text:p text:style-name="P28"><text:span text:style-name="T22">OPS &amp; EVAL:</text:span><text:span text:style-name="T23"> SHAP, Arize Phoenix, DeepEval, MLflow</text:span><text:span text:style-name="T24">, </text:span><text:span text:style-name="T25">Evidently</text:span><text:span text:style-name="T26">.</text:span></text:p>
            <text:p text:style-name="P29"><text:span text:style-name="T27">UI &amp; API:</text:span><text:span text:style-name="T28"> Chainlit, FastAPI, React, Marimo.</text:span></text:p>
            <text:p text:style-name="P30"><text:span text:style-name="T29">CI/CD &amp; QUALITY:</text:span><text:span text:style-name="T30"><text:s/></text:span><text:span text:style-name="T31">GitLab CI/CD, Pydantic, SonarQube.</text:span></text:p>
            <text:p text:style-name="P31"><text:span text:style-name="T32">INFRA:</text:span><text:span text:style-name="T33"> Kubernetes (K8s) &amp; Helm, Docker, OpenStack.</text:span></text:p>
            <text:p text:style-name="P32"><text:span text:style-name="T34">SAFETY:</text:span><text:span text:style-name="T35"> Architecture "</text:span><text:span text:style-name="T36">HIL</text:span><text:span text:style-name="T37">" &amp; Quantification (MAPIE).</text:span></text:p>
          </draw:text-box>
        </draw:frame>
        <draw:line xml:id="id14" draw:id="id14" draw:name="Прямая соединительная линия 9" draw:style-name="gr9" svg:x1="17.41cm" svg:x2="24.33cm" svg:y1="3.751cm" svg:y2="3.751cm">
          <text:p text:style-name="P33"><text:span/></text:p>
        </draw:line>
        <draw:frame xml:id="id15" draw:id="id15" draw:name="Titre 1" draw:style-name="gr10" svg:width="6.166cm" svg:height="2.491cm" svg:x="0.8785cm" svg:y="11.38cm">
          <draw:text-box fo:min-height="2.491cm">
            <text:p text:style-name="P34"><text:span text:style-name="T38">I provide technical and operational steering for AI projects, ensuring a seamless transition from scoping to production. I manage the complete product lifecycle—from V-Model (Safran, Automotive</text:span><text:span text:style-name="T39">, etc.</text:span><text:span text:style-name="T40">) to Agile (Airbus, Thales</text:span><text:span text:style-name="T41">, etc.</text:span><text:span text:style-name="T42">)—ensuring technical consistency and mission success for major industrial accounts.</text:span></text:p>
          </draw:text-box>
        </draw:frame>
        <draw:frame xml:id="id16" draw:id="id16" draw:name="TextBox 7" draw:style-name="gr11" svg:width="6.26cm" svg:height="0.7502cm" svg:x="0.785cm" svg:y="10.33cm">
          <draw:text-box fo:min-height="0.7502cm">
            <text:p text:style-name="P35"><text:span text:style-name="T43">Technical Leadership &amp; Delivery (Roadmap &amp; Dev)</text:span></text:p>
          </draw:text-box>
        </draw:frame>
        <draw:frame xml:id="id17" draw:id="id17" draw:name="Titre 1" draw:style-name="gr12" svg:width="6.073cm" svg:height="2.431cm" svg:x="0.8785cm" svg:y="7.408cm">
          <draw:text-box fo:min-height="2.431cm">
            <text:p text:style-name="P36"><text:span text:style-name="T44">I drive AI industrialization through robust MLOps/LLMOps and scalable architectural design (DAT). Leveraging deep R&amp;D and Industrial expertise, I bridge the gap between research and production, focusing on standardization, real-time execution, and Edge/Hybrid computing. I ensure every solution is built for reliability, security, and seamless integration into complex hardware and software ecosystems.</text:span></text:p>
          </draw:text-box>
        </draw:frame>
        <draw:frame xml:id="id18" draw:id="id18" draw:name="TextBox 7" draw:style-name="gr13" svg:width="6.26cm" svg:height="0.7502cm" svg:x="0.785cm" svg:y="6.36cm">
          <draw:text-box fo:min-height="0.7502cm">
            <text:p text:style-name="P37"><text:span text:style-name="T45">Engineering Excellence &amp; Standardization (Build &amp; Design)</text:span></text:p>
          </draw:text-box>
        </draw:frame>
        <draw:frame xml:id="id19" draw:id="id19" draw:name="Titre 1" draw:style-name="gr14" svg:width="6.073cm" svg:height="2.711cm" svg:x="0.8785cm" svg:y="3.438cm">
          <draw:text-box fo:min-height="2.711cm">
            <text:p text:style-name="P38"><text:span text:style-name="T46">Expert in Industry &amp; Services, I translate complex operational needs into technical reality within highly constrained environments (isolated networks, security mandates). My approach focuses on identifying value and securing the end-to-end lifecycle, deploying industrial-grade solutions such as multi-agent systems and semantic ontologies.</text:span></text:p>
          </draw:text-box>
        </draw:frame>
        <draw:frame xml:id="id20" draw:id="id20" draw:name="TextBox 7" draw:style-name="gr15" svg:width="6.26cm" svg:height="0.7502cm" svg:x="0.785cm" svg:y="2.389cm">
          <draw:text-box fo:min-height="0.7502cm">
            <text:p text:style-name="P39"><text:span text:style-name="T47">Strategic Framing &amp; Vision (Clarify &amp; Identify)</text:span></text:p>
          </draw:text-box>
        </draw:frame>
        <draw:frame xml:id="id21" draw:id="id21" draw:style-name="gr16" draw:transform="rotate(-81.681407248005371) translate(20.54cm,13.59cm)" svg:width="3.253cm" svg:height="0.509cm">
          <draw:text-box fo:min-height="0.509cm">
            <text:p text:style-name="P40"><text:span text:style-name="T48">Fabien FURFARO (2026)</text:span></text:p>
          </draw:text-box>
        </draw:frame>
        <draw:frame xml:id="id22" draw:id="id22" draw:name="Object_ce1" draw:style-name="gr17" draw:transform="rotate(-0) translate(17.71cm,8.985cm)" svg:width="6.243cm" svg:height="3.219cm">
          <table:table table:style-name="ta1">
            <table:table-column table:style-name="co1"/>
            <table:table-column table:style-name="co2"/>
            <table:table-row table:style-name="ro1" table:default-cell-style-name="ce1">
              <table:table-cell table:style-name="ce2">
                <text:p text:style-name="P41"><text:span text:style-name="T49">Domain</text:span></text:p>
              </table:table-cell>
              <table:table-cell table:style-name="ce3">
                <text:p text:style-name="P42"><text:span text:style-name="T50">Core Competencies &amp; Experience</text:span></text:p>
              </table:table-cell>
            </table:table-row>
            <table:table-row table:style-name="ro2" table:default-cell-style-name="ce1">
              <table:table-cell table:style-name="ce4">
                <text:p text:style-name="P43"><text:span text:style-name="T51">Tech Skills</text:span></text:p>
              </table:table-cell>
              <table:table-cell table:style-name="ce5">
                <text:p text:style-name="P44"><text:span text:style-name="T52">Python</text:span><text:span text:style-name="T53">: 12y (SOLID, TDD) • </text:span><text:span text:style-name="T54">Data</text:span><text:span text:style-name="T55">: 10y (ACID, MLOps) • </text:span><text:span text:style-name="T56">Vision</text:span><text:span text:style-name="T57">: 5y (DL) • </text:span><text:span text:style-name="T58">GenAI</text:span><text:span text:style-name="T59">: 5y (RAG, Agents) • </text:span><text:span text:style-name="T60">DevOps</text:span><text:span text:style-name="T61">: 5y (K8s, CI)</text:span></text:p>
              </table:table-cell>
            </table:table-row>
            <table:table-row table:style-name="ro3" table:default-cell-style-name="ce1">
              <table:table-cell table:style-name="ce6">
                <text:p text:style-name="P45"><text:span text:style-name="T62">Sectors</text:span></text:p>
              </table:table-cell>
              <table:table-cell table:style-name="ce7">
                <text:p text:style-name="P46"><text:span text:style-name="T63">Science &amp; Research</text:span><text:span text:style-name="T64">: 5y (PhD) • </text:span><text:span text:style-name="T65">Industry &amp; Defense</text:span><text:span text:style-name="T66">: 5y</text:span></text:p>
              </table:table-cell>
            </table:table-row>
            <table:table-row table:style-name="ro4" table:default-cell-style-name="ce1">
              <table:table-cell table:style-name="ce8">
                <text:p text:style-name="P47"><text:span text:style-name="T67">Methodology</text:span></text:p>
              </table:table-cell>
              <table:table-cell table:style-name="ce9">
                <text:p text:style-name="P48"><text:span text:style-name="T68">Leadership</text:span><text:span text:style-name="T69">: 4y • </text:span><text:span text:style-name="T70">AI Architecture</text:span><text:span text:style-name="T71">: 3y (IAF/TOGAF) • </text:span><text:span text:style-name="T72">Lifecycle</text:span><text:span text:style-name="T73">: 4y (Agile/V-Model)</text:span></text:p>
              </table:table-cell>
            </table:table-row>
          </table:table>
        </draw:frame>
        <presentation:notes draw:style-name="dp6">
          <draw:frame xml:id="id23" draw:id="id23" draw:name="Slide Image Placeholder 1" draw:text-style-name="P49" draw:layer="layout" presentation:style-name="pr7" presentation:class="page" presentation:placeholder="true" svg:width="0.03528cm" svg:height="0.03528cm" svg:x="0cm" svg:y="0cm">
            <draw:text-box fo:min-height="0.03528cm">
              <text:p text:style-name="P50"><text:span/></text:p>
            </draw:text-box>
          </draw:frame>
          <draw:frame xml:id="id24" draw:id="id24" draw:name="Notes Placeholder 2" draw:text-style-name="P51" draw:layer="layout" presentation:style-name="pr8" presentation:class="outline" presentation:placeholder="true" svg:width="0.03528cm" svg:height="0.03528cm" svg:x="0cm" svg:y="0cm">
            <draw:text-box fo:min-height="0.03528cm">
              <text:p text:style-name="P52"><text:span/></text:p>
            </draw:text-box>
          </draw:frame>
          <draw:frame xml:id="id25" draw:id="id25" draw:name="Slide Number Placeholder 3" draw:text-style-name="P53" draw:layer="layout" presentation:style-name="pr9" presentation:class="page-number" presentation:placeholder="true" svg:width="0.03528cm" svg:height="0.03528cm" svg:x="0cm" svg:y="0cm">
            <draw:text-box fo:min-height="0.03528cm">
              <text:p text:style-name="P54"><text:span text:style-name="T74"><text:page-number/></text:span></text:p>
            </draw:text-box>
          </draw:frame>
        </presentation:notes>
      </draw:page>
      <draw:page draw:name="Slide1537" draw:style-name="dp7" draw:master-page-name="__________________________Master1-Layout1-cust-Cover-Double-Images" presentation:presentation-page-layout-name="AL1">
        <draw:custom-shape xml:id="id26" draw:id="id26" draw:style-name="gr18" draw:transform="rotate(-106.81414789494731) translate(8.629cm,4.237cm)" svg:width="15.77cm" svg:height="4.793cm">
          <text:p text:style-name="P55"><text:span/></text:p>
          <draw:enhanced-geometry draw:type="flowchart-alternate-process"/>
        </draw:custom-shape>
        <draw:frame xml:id="id27" draw:id="id27" draw:name="Espace réservé du texte 8" draw:text-style-name="P56" draw:layer="layout" presentation:style-name="pr10" presentation:class="outline" presentation:placeholder="true" svg:width="21.72cm" svg:height="0.7242cm" svg:x="0.7382cm" svg:y="0.3679cm">
          <draw:text-box fo:min-height="0.7242cm">
            <text:p text:style-name="P57"><text:span text:style-name="T75">From Imagery to Actionable Intelligence</text:span></text:p>
          </draw:text-box>
        </draw:frame>
        <draw:frame xml:id="id28" draw:id="id28" draw:name="Espace réservé du texte 1" draw:text-style-name="P58" draw:layer="layout" presentation:style-name="pr11" presentation:class="outline" presentation:placeholder="true" svg:width="21.72cm" svg:height="0.4477cm" svg:x="0.7382cm" svg:y="1.222cm">
          <draw:text-box fo:min-height="0.4477cm">
            <text:p text:style-name="P59"><text:span text:style-name="T76">Accelerating satellite data exploitation for faster military decisions (AI Architect - Defense)</text:span></text:p>
          </draw:text-box>
        </draw:frame>
        <draw:frame xml:id="id29" draw:id="id29" draw:name="Titre 1" draw:style-name="gr19" svg:width="6.073cm" svg:height="1.599cm" svg:x="0.8785cm" svg:y="3.438cm">
          <draw:text-box fo:min-height="1.599cm">
            <text:p text:style-name="P60"><text:span text:style-name="T77">High-frequency satellite imagery (IMINT) saturation exceeds manual processing limits. This data-to-intelligence gap creates a bottleneck, resulting in critical decision latency in near-real-time (NRT) cycles.</text:span></text:p>
          </draw:text-box>
        </draw:frame>
        <draw:line xml:id="id30" draw:id="id30" draw:name="Прямая соединительная линия 9" draw:style-name="gr20" svg:x1="7.679cm" svg:x2="7.679cm" svg:y1="2.865cm" svg:y2="13.87cm">
          <text:p text:style-name="P61"><text:span/></text:p>
        </draw:line>
        <draw:frame xml:id="id31" draw:id="id31" draw:name="TextBox 7" draw:style-name="gr21" svg:width="6.26cm" svg:height="0.7502cm" svg:x="0.785cm" svg:y="2.389cm">
          <draw:text-box fo:min-height="0.7502cm">
            <text:p text:style-name="P62"><text:span text:style-name="T78">Client Context &amp; Problem</text:span></text:p>
          </draw:text-box>
        </draw:frame>
        <draw:frame xml:id="id32" draw:id="id32" draw:name="TextBox 7" draw:style-name="gr22" svg:width="15.44cm" svg:height="1.794cm" svg:x="8.82cm" svg:y="2.541cm">
          <draw:text-box fo:min-height="1.794cm">
            <text:p text:style-name="P63"><text:span text:style-name="T79">Architecture</text:span></text:p>
            <text:p text:style-name="P64"><text:span/></text:p>
            <text:p text:style-name="P65"><text:span text:style-name="T80">Asynchronous pipeline utilizing ViT encoders for semantic feature extraction. Persisted vector embeddings enable contextual retrieval, while ReAct agentic loops cross-reference detections with tactical ontologies to synthesize deterministic reports.</text:span></text:p>
          </draw:text-box>
        </draw:frame>
        <draw:frame xml:id="id33" draw:id="id33" draw:name="Titre 1" draw:style-name="gr23" svg:width="6.073cm" svg:height="1.599cm" svg:x="0.8785cm" svg:y="6.383cm">
          <draw:text-box fo:min-height="1.599cm">
            <text:p text:style-name="P66"><text:span text:style-name="T81">Strategic </text:span><text:span text:style-name="T82">decision </text:span><text:span text:style-name="T83">loop compression. Accelerating the transition from raw sensor data to structured intelligence is a prerequisite for maintaining tactical initiative in high-intensity environments.</text:span></text:p>
          </draw:text-box>
        </draw:frame>
        <draw:frame xml:id="id34" draw:id="id34" draw:name="TextBox 7" draw:style-name="gr24" svg:width="6.26cm" svg:height="0.7502cm" svg:x="0.785cm" svg:y="5.335cm">
          <draw:text-box fo:min-height="0.7502cm">
            <text:p text:style-name="P67"><text:span text:style-name="T84">Why Prioritized</text:span></text:p>
          </draw:text-box>
        </draw:frame>
        <draw:frame xml:id="id35" draw:id="id35" draw:name="Titre 1" draw:style-name="gr25" svg:width="6.166cm" svg:height="1.599cm" svg:x="0.8785cm" svg:y="9.329cm">
          <draw:text-box fo:min-height="1.599cm">
            <text:p text:style-name="P68"><text:span text:style-name="T85">Asynchronous pipeline using ViT encoders for semantic feature extraction. ReAct agentic loops cross-reference detections with tactical knowledge bases via vector search to synthesize reports.</text:span></text:p>
          </draw:text-box>
        </draw:frame>
        <draw:frame xml:id="id36" draw:id="id36" draw:name="TextBox 7" draw:style-name="gr26" svg:width="6.26cm" svg:height="0.7502cm" svg:x="0.785cm" svg:y="8.28cm">
          <draw:text-box fo:min-height="0.7502cm">
            <text:p text:style-name="P69"><text:span text:style-name="T86">Solution &amp; Rationale</text:span></text:p>
          </draw:text-box>
        </draw:frame>
        <draw:frame xml:id="id37" draw:id="id37" draw:name="Titre 1" draw:style-name="gr27" svg:width="6.073cm" svg:height="1.599cm" svg:x="0.8785cm" svg:y="12.27cm">
          <draw:text-box fo:min-height="1.599cm">
            <text:p text:style-name="P70"><text:span text:style-name="T87">Multimodal LLMs (GPT-4V / Apache 2.0 OS), LangChain, Python, Gitlab CI/CD, Vector DB.</text:span></text:p>
          </draw:text-box>
        </draw:frame>
        <draw:frame xml:id="id38" draw:id="id38" draw:name="TextBox 7" draw:style-name="gr28" svg:width="6.26cm" svg:height="0.7502cm" svg:x="0.785cm" svg:y="11.23cm">
          <draw:text-box fo:min-height="0.7502cm">
            <text:p text:style-name="P71"><text:span text:style-name="T88">Technologies</text:span></text:p>
          </draw:text-box>
        </draw:frame>
        <draw:frame xml:id="id39" draw:id="id39" draw:name="Google Shape;313;p19" draw:style-name="gr29" svg:width="4.071cm" svg:height="3.332cm" svg:x="8.629cm" svg:y="9.814cm">
          <draw:image xlink:href="Pictures/image3.png" xlink:type="simple" xlink:show="embed" xlink:actuate="onLoad"/>
        </draw:frame>
        <draw:frame xml:id="id40" draw:id="id40" draw:name="Google Shape;313;p19" draw:style-name="gr30" svg:width="4.071cm" svg:height="3.332cm" svg:x="13.6cm" svg:y="9.814cm">
          <draw:image xlink:href="Pictures/image3.png" xlink:type="simple" xlink:show="embed" xlink:actuate="onLoad"/>
        </draw:frame>
        <draw:frame xml:id="id41" draw:id="id41" draw:name="TextBox 7" draw:style-name="gr31" svg:width="2.986cm" svg:height="2.801cm" svg:x="9.032cm" svg:y="10.13cm">
          <draw:text-box fo:min-height="2.801cm">
            <text:p text:style-name="P72"><text:span text:style-name="T89">Value / </text:span><text:span text:style-name="T90">KPI</text:span></text:p>
            <text:p text:style-name="P73"><text:span/></text:p>
            <text:p text:style-name="P74"><text:span text:style-name="T91">Demonstrated reduction in report latency and a</text:span><text:span text:style-name="T92"><text:s/></text:span><text:span text:style-name="T93">increase in operational throughput per analyst.</text:span></text:p>
          </draw:text-box>
        </draw:frame>
        <draw:frame xml:id="id42" draw:id="id42" draw:name="TextBox 7" draw:style-name="gr32" svg:width="2.986cm" svg:height="2.801cm" svg:x="14.01cm" svg:y="10.08cm">
          <draw:text-box fo:min-height="2.801cm">
            <text:p text:style-name="P75"><text:span text:style-name="T94">Investment</text:span></text:p>
            <text:p text:style-name="P76"><text:span/></text:p>
            <text:p text:style-name="P77"><text:span text:style-name="T95">2</text:span><text:span text:style-name="T96">-month scoping and project launch phase. Focused on automated report generation and architectural alignment</text:span><text:span text:style-name="T97">.</text:span></text:p>
          </draw:text-box>
        </draw:frame>
        <draw:frame xml:id="id43" draw:id="id43" draw:style-name="gr33" svg:width="5.877cm" svg:height="3.526cm" svg:x="18.38cm" svg:y="9.639cm">
          <draw:image xlink:href="Pictures/image4.jpg" xlink:type="simple" xlink:show="embed" xlink:actuate="onLoad"/>
        </draw:frame>
        <draw:frame xml:id="id44" draw:id="id44" draw:style-name="gr34" svg:width="12.83cm" svg:height="4.536cm" svg:x="9.941cm" svg:y="4.335cm">
          <draw:image xlink:href="Pictures/image5.png" xlink:type="simple" xlink:show="embed" xlink:actuate="onLoad"/>
        </draw:frame>
        <draw:frame xml:id="id45" draw:id="id45" draw:style-name="gr35" draw:transform="rotate(-81.681407248005371) translate(20.54cm,13.59cm)" svg:width="3.252cm" svg:height="0.509cm">
          <draw:text-box fo:min-height="0.509cm">
            <text:p text:style-name="P78"><text:span text:style-name="T98">Fabien FURFARO (2026)</text:span></text:p>
          </draw:text-box>
        </draw:frame>
        <draw:frame xml:id="id46" draw:id="id46" draw:style-name="gr36" draw:transform="rotate(-81.681407248005371) translate(22.16cm,0.08307cm)" svg:width="3.254cm" svg:height="0.509cm">
          <draw:text-box fo:min-height="0.509cm">
            <text:p text:style-name="P79"><text:span text:style-name="T99">Fabien FURFARO (2026)</text:span></text:p>
          </draw:text-box>
        </draw:frame>
        <presentation:notes draw:style-name="dp8">
          <draw:frame xml:id="id47" draw:id="id47" draw:name="Slide Image Placeholder 1" draw:text-style-name="P80" draw:layer="layout" presentation:style-name="pr12" presentation:class="page" presentation:placeholder="true" svg:width="0.03528cm" svg:height="0.03528cm" svg:x="0cm" svg:y="0cm">
            <draw:text-box fo:min-height="0.03528cm">
              <text:p text:style-name="P81"><text:span/></text:p>
            </draw:text-box>
          </draw:frame>
          <draw:frame xml:id="id48" draw:id="id48" draw:name="Notes Placeholder 2" draw:text-style-name="P82" draw:layer="layout" presentation:style-name="pr13" presentation:class="outline" presentation:placeholder="true" svg:width="0.03528cm" svg:height="0.03528cm" svg:x="0cm" svg:y="0cm">
            <draw:text-box fo:min-height="0.03528cm">
              <text:p text:style-name="P83"><text:span/></text:p>
            </draw:text-box>
          </draw:frame>
          <draw:frame xml:id="id49" draw:id="id49" draw:name="Slide Number Placeholder 3" draw:text-style-name="P84" draw:layer="layout" presentation:style-name="pr14" presentation:class="page-number" presentation:placeholder="true" svg:width="0.03528cm" svg:height="0.03528cm" svg:x="0cm" svg:y="0cm">
            <draw:text-box fo:min-height="0.03528cm">
              <text:p text:style-name="P85"><text:span text:style-name="T100"><text:page-number/></text:span></text:p>
            </draw:text-box>
          </draw:frame>
        </presentation:notes>
      </draw:page>
      <draw:page draw:name="Slide1537" draw:style-name="dp9" draw:master-page-name="__________________________Master1-Layout1-cust-Cover-Double-Images" presentation:presentation-page-layout-name="AL1">
        <draw:custom-shape xml:id="id50" draw:id="id50" draw:style-name="gr37" draw:transform="rotate(-106.81414789494731) translate(8.629cm,4.237cm)" svg:width="15.77cm" svg:height="4.793cm">
          <text:p text:style-name="P86"><text:span/></text:p>
          <draw:enhanced-geometry draw:type="flowchart-alternate-process"/>
        </draw:custom-shape>
        <draw:frame xml:id="id51" draw:id="id51" draw:name="Espace réservé du texte 8" draw:text-style-name="P87" draw:layer="layout" presentation:style-name="pr15" presentation:class="outline" presentation:placeholder="true" svg:width="21.72cm" svg:height="0.7242cm" svg:x="0.7382cm" svg:y="0.3679cm">
          <draw:text-box fo:min-height="0.7242cm">
            <text:p text:style-name="P88"><text:span text:style-name="T101">Optimizing MISSION Logistics Decisions</text:span></text:p>
          </draw:text-box>
        </draw:frame>
        <draw:frame xml:id="id52" draw:id="id52" draw:name="Espace réservé du texte 1" draw:text-style-name="P89" draw:layer="layout" presentation:style-name="pr16" presentation:class="outline" presentation:placeholder="true" svg:width="21.72cm" svg:height="0.4477cm" svg:x="0.7382cm" svg:y="1.222cm">
          <draw:text-box fo:min-height="0.4477cm">
            <text:p text:style-name="P90"><text:span text:style-name="T102">AI-driven allocation under complex operational constraints (</text:span><text:span text:style-name="T103">AI Tech Lead</text:span><text:span text:style-name="T104"> - Defense)</text:span></text:p>
          </draw:text-box>
        </draw:frame>
        <draw:frame xml:id="id53" draw:id="id53" draw:name="Titre 1" draw:style-name="gr38" svg:width="6.073cm" svg:height="1.599cm" svg:x="0.8785cm" svg:y="3.438cm">
          <draw:text-box fo:min-height="1.599cm">
            <text:p text:style-name="P91"><text:span text:style-name="T105">High-intensity fleet mobility exceeds manual logistical planning capacity. Resource allocation (spare parts, maintenance) under unstable constraints results in sub-optimal mission readiness.</text:span></text:p>
          </draw:text-box>
        </draw:frame>
        <draw:line xml:id="id54" draw:id="id54" draw:name="Прямая соединительная линия 9" draw:style-name="gr39" svg:x1="7.679cm" svg:x2="7.679cm" svg:y1="2.865cm" svg:y2="13.87cm">
          <text:p text:style-name="P92"><text:span/></text:p>
        </draw:line>
        <draw:frame xml:id="id55" draw:id="id55" draw:name="TextBox 7" draw:style-name="gr40" svg:width="6.26cm" svg:height="0.7502cm" svg:x="0.785cm" svg:y="2.389cm">
          <draw:text-box fo:min-height="0.7502cm">
            <text:p text:style-name="P93"><text:span text:style-name="T106">Client Context &amp; Problem</text:span></text:p>
          </draw:text-box>
        </draw:frame>
        <draw:frame xml:id="id56" draw:id="id56" draw:name="TextBox 7" draw:style-name="gr41" svg:width="15.44cm" svg:height="1.794cm" svg:x="8.82cm" svg:y="2.541cm">
          <draw:text-box fo:min-height="1.794cm">
            <text:p text:style-name="P94"><text:span text:style-name="T107">Architecture</text:span></text:p>
            <text:p text:style-name="P95"><text:span/></text:p>
            <text:p text:style-name="P96"><text:span text:style-name="T108">I</text:span><text:span text:style-name="T109">ngestion of operational data processed by LightGBM for predictive failure modeling. OR-Tools solve for optimal asset ranking and spare part inventory right-sizing based on mission-specific parameters.</text:span></text:p>
          </draw:text-box>
        </draw:frame>
        <draw:frame xml:id="id57" draw:id="id57" draw:name="Titre 1" draw:style-name="gr42" svg:width="6.073cm" svg:height="1.599cm" svg:x="0.8785cm" svg:y="6.383cm">
          <draw:text-box fo:min-height="1.599cm">
            <text:p text:style-name="P97"><text:span text:style-name="T110">Strategic Paris Air Show showcase. Demonstrating operational superiority through "right stocks, right place, right time" optimization and a reduced logistical footprint</text:span><text:span text:style-name="T111"> while maximizing fleet availability.</text:span></text:p>
          </draw:text-box>
        </draw:frame>
        <draw:frame xml:id="id58" draw:id="id58" draw:name="TextBox 7" draw:style-name="gr43" svg:width="6.26cm" svg:height="0.7502cm" svg:x="0.785cm" svg:y="5.335cm">
          <draw:text-box fo:min-height="0.7502cm">
            <text:p text:style-name="P98"><text:span text:style-name="T112">Why Prioritized</text:span></text:p>
          </draw:text-box>
        </draw:frame>
        <draw:frame xml:id="id59" draw:id="id59" draw:name="Titre 1" draw:style-name="gr44" svg:width="6.166cm" svg:height="1.599cm" svg:x="0.8785cm" svg:y="9.329cm">
          <draw:text-box fo:min-height="1.599cm">
            <text:p text:style-name="P99"><text:span text:style-name="T113">Operations Research (OR) + ML framework. OR-Tools manage deterministic constraints and rules-driven allocation, while ML/Deep Learning models handle predictive maintenance and failure detection.</text:span></text:p>
          </draw:text-box>
        </draw:frame>
        <draw:frame xml:id="id60" draw:id="id60" draw:name="TextBox 7" draw:style-name="gr45" svg:width="6.26cm" svg:height="0.7502cm" svg:x="0.785cm" svg:y="8.28cm">
          <draw:text-box fo:min-height="0.7502cm">
            <text:p text:style-name="P100"><text:span text:style-name="T114">Solution &amp; Rationale</text:span></text:p>
          </draw:text-box>
        </draw:frame>
        <draw:frame xml:id="id61" draw:id="id61" draw:name="Titre 1" draw:style-name="gr46" svg:width="6.073cm" svg:height="1.599cm" svg:x="0.8785cm" svg:y="12.27cm">
          <draw:text-box fo:min-height="1.599cm">
            <text:p text:style-name="P101"><text:span text:style-name="T115">OR-Tools, LightGBM, Symbolic AI</text:span><text:span text:style-name="T116"> (Expert)</text:span><text:span text:style-name="T117">, Azure, EKS (Kubernetes), Gitlab CI.</text:span></text:p>
          </draw:text-box>
        </draw:frame>
        <draw:frame xml:id="id62" draw:id="id62" draw:name="TextBox 7" draw:style-name="gr47" svg:width="6.26cm" svg:height="0.7502cm" svg:x="0.785cm" svg:y="11.23cm">
          <draw:text-box fo:min-height="0.7502cm">
            <text:p text:style-name="P102"><text:span text:style-name="T118">Technologies</text:span></text:p>
          </draw:text-box>
        </draw:frame>
        <draw:frame xml:id="id63" draw:id="id63" draw:name="Google Shape;313;p19" draw:style-name="gr48" svg:width="4.071cm" svg:height="3.332cm" svg:x="8.629cm" svg:y="9.814cm">
          <draw:image xlink:href="Pictures/image3.png" xlink:type="simple" xlink:show="embed" xlink:actuate="onLoad"/>
        </draw:frame>
        <draw:frame xml:id="id64" draw:id="id64" draw:name="Google Shape;313;p19" draw:style-name="gr49" svg:width="4.071cm" svg:height="3.332cm" svg:x="13.6cm" svg:y="9.814cm">
          <draw:image xlink:href="Pictures/image3.png" xlink:type="simple" xlink:show="embed" xlink:actuate="onLoad"/>
        </draw:frame>
        <draw:frame xml:id="id65" draw:id="id65" draw:name="TextBox 7" draw:style-name="gr50" svg:width="2.986cm" svg:height="2.801cm" svg:x="9.032cm" svg:y="10.13cm">
          <draw:text-box fo:min-height="2.801cm">
            <text:p text:style-name="P103"><text:span text:style-name="T119">Value / </text:span><text:span text:style-name="T120">KPI</text:span></text:p>
            <text:p text:style-name="P104"><text:span/></text:p>
            <text:p text:style-name="P105"><text:span text:style-name="T121">R</text:span><text:span text:style-name="T122">eduction in logistical costs and automated calculation of mission success probabilities.</text:span></text:p>
          </draw:text-box>
        </draw:frame>
        <draw:frame xml:id="id66" draw:id="id66" draw:name="TextBox 7" draw:style-name="gr51" svg:width="2.986cm" svg:height="2.801cm" svg:x="14.01cm" svg:y="10.08cm">
          <draw:text-box fo:min-height="2.801cm">
            <text:p text:style-name="P106"><text:span text:style-name="T123">Investment</text:span></text:p>
            <text:p text:style-name="P107"><text:span/></text:p>
            <text:p text:style-name="P108"><text:span text:style-name="T124">6 months | Industrialization focused on high-resilience and "TrustNest Restricted" deployment.</text:span></text:p>
          </draw:text-box>
        </draw:frame>
        <draw:frame xml:id="id67" draw:id="id67" draw:style-name="gr52" svg:width="6.469cm" svg:height="2.965cm" svg:x="17.93cm" svg:y="10.08cm">
          <draw:image xlink:href="Pictures/image6.jpg" xlink:type="simple" xlink:show="embed" xlink:actuate="onLoad"/>
        </draw:frame>
        <draw:frame xml:id="id68" draw:id="id68" draw:style-name="gr53" svg:width="15.56cm" svg:height="2.998cm" svg:x="8.763cm" svg:y="5.17cm">
          <draw:image xlink:href="Pictures/image7.png" xlink:type="simple" xlink:show="embed" xlink:actuate="onLoad"/>
        </draw:frame>
        <draw:frame xml:id="id69" draw:id="id69" draw:style-name="gr54" draw:transform="rotate(-81.681407248005371) translate(20.54cm,13.59cm)" svg:width="3.253cm" svg:height="0.509cm">
          <draw:text-box fo:min-height="0.509cm">
            <text:p text:style-name="P109"><text:span text:style-name="T125">Fabien FURFARO (2026)</text:span></text:p>
          </draw:text-box>
        </draw:frame>
        <draw:frame xml:id="id70" draw:id="id70" draw:style-name="gr55" draw:transform="rotate(-81.681407248005371) translate(22.16cm,0.08357cm)" svg:width="3.255cm" svg:height="0.509cm">
          <draw:text-box fo:min-height="0.509cm">
            <text:p text:style-name="P110"><text:span text:style-name="T126">Fabien FURFARO (2026)</text:span></text:p>
          </draw:text-box>
        </draw:frame>
        <presentation:notes draw:style-name="dp10">
          <draw:frame xml:id="id71" draw:id="id71" draw:name="Slide Image Placeholder 1" draw:text-style-name="P111" draw:layer="layout" presentation:style-name="pr17" presentation:class="page" presentation:placeholder="true" svg:width="0.03528cm" svg:height="0.03528cm" svg:x="0cm" svg:y="0cm">
            <draw:text-box fo:min-height="0.03528cm">
              <text:p text:style-name="P112"><text:span/></text:p>
            </draw:text-box>
          </draw:frame>
          <draw:frame xml:id="id72" draw:id="id72" draw:name="Notes Placeholder 2" draw:text-style-name="P113" draw:layer="layout" presentation:style-name="pr18" presentation:class="outline" presentation:placeholder="true" svg:width="0.03528cm" svg:height="0.03528cm" svg:x="0cm" svg:y="0cm">
            <draw:text-box fo:min-height="0.03528cm">
              <text:p text:style-name="P114"><text:span/></text:p>
            </draw:text-box>
          </draw:frame>
          <draw:frame xml:id="id73" draw:id="id73" draw:name="Slide Number Placeholder 3" draw:text-style-name="P115" draw:layer="layout" presentation:style-name="pr19" presentation:class="page-number" presentation:placeholder="true" svg:width="0.03528cm" svg:height="0.03528cm" svg:x="0cm" svg:y="0cm">
            <draw:text-box fo:min-height="0.03528cm">
              <text:p text:style-name="P116"><text:span text:style-name="T127"><text:page-number/></text:span></text:p>
            </draw:text-box>
          </draw:frame>
        </presentation:notes>
      </draw:page>
      <draw:page draw:name="Slide1537" draw:style-name="dp11" draw:master-page-name="__________________________Master1-Layout1-cust-Cover-Double-Images" presentation:presentation-page-layout-name="AL1">
        <draw:custom-shape xml:id="id74" draw:id="id74" draw:style-name="gr56" draw:transform="rotate(-106.81414789494731) translate(8.629cm,4.237cm)" svg:width="15.77cm" svg:height="4.793cm">
          <text:p text:style-name="P117"><text:span/></text:p>
          <draw:enhanced-geometry draw:type="flowchart-alternate-process"/>
        </draw:custom-shape>
        <draw:frame xml:id="id75" draw:id="id75" draw:name="Espace réservé du texte 8" draw:text-style-name="P118" draw:layer="layout" presentation:style-name="pr20" presentation:class="outline" presentation:placeholder="true" svg:width="21.72cm" svg:height="0.7242cm" svg:x="0.7382cm" svg:y="0.3679cm">
          <draw:text-box fo:min-height="0.7242cm">
            <text:p text:style-name="P119"><text:span text:style-name="T128">Spatial Localization of Blade Defects</text:span></text:p>
          </draw:text-box>
        </draw:frame>
        <draw:frame xml:id="id76" draw:id="id76" draw:name="Espace réservé du texte 1" draw:text-style-name="P120" draw:layer="layout" presentation:style-name="pr21" presentation:class="outline" presentation:placeholder="true" svg:width="21.72cm" svg:height="0.4477cm" svg:x="0.7382cm" svg:y="1.222cm">
          <draw:text-box fo:min-height="0.4477cm">
            <text:p text:style-name="P121"><text:span text:style-name="T129">3D-to-2D registration for automated engine inspection (</text:span><text:span text:style-name="T130">AI Tech Lead</text:span><text:span text:style-name="T131"> &amp; Architect - Aerospace)</text:span></text:p>
          </draw:text-box>
        </draw:frame>
        <draw:frame xml:id="id77" draw:id="id77" draw:name="Titre 1" draw:style-name="gr57" svg:width="6.073cm" svg:height="1.599cm" svg:x="0.8785cm" svg:y="3.438cm">
          <draw:text-box fo:min-height="1.599cm">
            <text:p text:style-name="P122"><text:span text:style-name="T132">Boroscopic images exhibit high perspective distortion, preventing accurate mapping of 2D detections to 3D CAD models. Manual localization is insufficient for precise structural integrity assessment.</text:span></text:p>
          </draw:text-box>
        </draw:frame>
        <draw:line xml:id="id78" draw:id="id78" draw:name="Прямая соединительная линия 9" draw:style-name="gr58" svg:x1="7.679cm" svg:x2="7.679cm" svg:y1="2.865cm" svg:y2="13.87cm">
          <text:p text:style-name="P123"><text:span/></text:p>
        </draw:line>
        <draw:frame xml:id="id79" draw:id="id79" draw:name="TextBox 7" draw:style-name="gr59" svg:width="6.26cm" svg:height="0.7502cm" svg:x="0.785cm" svg:y="2.389cm">
          <draw:text-box fo:min-height="0.7502cm">
            <text:p text:style-name="P124"><text:span text:style-name="T133">Client Context &amp; Problem</text:span></text:p>
          </draw:text-box>
        </draw:frame>
        <draw:frame xml:id="id80" draw:id="id80" draw:name="TextBox 7" draw:style-name="gr60" svg:width="15.44cm" svg:height="1.794cm" svg:x="8.82cm" svg:y="2.541cm">
          <draw:text-box fo:min-height="1.794cm">
            <text:p text:style-name="P125"><text:span text:style-name="T134">Architecture</text:span></text:p>
            <text:p text:style-name="P126"><text:span/></text:p>
            <text:p text:style-name="P127"><text:span text:style-name="T135">Modular 4-Work Package (WP) structure. The pipeline estimates the camera pose relative to the mesh and projects 2D pixels into 3D space, followed by a statistical validation layer.</text:span></text:p>
          </draw:text-box>
        </draw:frame>
        <draw:frame xml:id="id81" draw:id="id81" draw:name="Titre 1" draw:style-name="gr61" svg:width="6.073cm" svg:height="1.599cm" svg:x="0.8785cm" svg:y="6.383cm">
          <draw:text-box fo:min-height="1.599cm">
            <text:p text:style-name="P128"><text:span text:style-name="T136">Required for high-fidelity damage tracking. Determining exact 3D coordinates is mandatory to monitor defect evolution and validate repair tolerances in turbine blade lifecycles.</text:span></text:p>
          </draw:text-box>
        </draw:frame>
        <draw:frame xml:id="id82" draw:id="id82" draw:name="TextBox 7" draw:style-name="gr62" svg:width="6.26cm" svg:height="0.7502cm" svg:x="0.785cm" svg:y="5.335cm">
          <draw:text-box fo:min-height="0.7502cm">
            <text:p text:style-name="P129"><text:span text:style-name="T137">Why Prioritized</text:span></text:p>
          </draw:text-box>
        </draw:frame>
        <draw:frame xml:id="id83" draw:id="id83" draw:name="Titre 1" draw:style-name="gr63" svg:width="6.166cm" svg:height="1.599cm" svg:x="0.8785cm" svg:y="9.329cm">
          <draw:text-box fo:min-height="1.599cm">
            <text:p text:style-name="P130"><text:span text:style-name="T138">3D-to-2D registration PoC using boroscopic RGB-D data. Evaluation of Geometric (ICP + PnP) vs. Neural (FoundationPose) pipelines. Integration of MAPIE to provide rigorous uncertainty quantification for the estimated 6D pose.</text:span></text:p>
          </draw:text-box>
        </draw:frame>
        <draw:frame xml:id="id84" draw:id="id84" draw:name="TextBox 7" draw:style-name="gr64" svg:width="6.26cm" svg:height="0.7502cm" svg:x="0.785cm" svg:y="8.28cm">
          <draw:text-box fo:min-height="0.7502cm">
            <text:p text:style-name="P131"><text:span text:style-name="T139">Solution &amp; Rationale</text:span></text:p>
          </draw:text-box>
        </draw:frame>
        <draw:frame xml:id="id85" draw:id="id85" draw:name="Titre 1" draw:style-name="gr65" svg:width="6.073cm" svg:height="1.599cm" svg:x="0.8785cm" svg:y="12.27cm">
          <draw:text-box fo:min-height="1.599cm">
            <text:p text:style-name="P132"><text:span text:style-name="T140">FoundationPose, ICP, PnP, MAPIE, PyTorch3D, Trimesh, Open3D.</text:span></text:p>
          </draw:text-box>
        </draw:frame>
        <draw:frame xml:id="id86" draw:id="id86" draw:name="TextBox 7" draw:style-name="gr66" svg:width="6.26cm" svg:height="0.7502cm" svg:x="0.785cm" svg:y="11.23cm">
          <draw:text-box fo:min-height="0.7502cm">
            <text:p text:style-name="P133"><text:span text:style-name="T141">Technologies</text:span></text:p>
          </draw:text-box>
        </draw:frame>
        <draw:frame xml:id="id87" draw:id="id87" draw:name="Google Shape;313;p19" draw:style-name="gr67" svg:width="4.071cm" svg:height="3.332cm" svg:x="8.629cm" svg:y="9.814cm">
          <draw:image xlink:href="Pictures/image3.png" xlink:type="simple" xlink:show="embed" xlink:actuate="onLoad"/>
        </draw:frame>
        <draw:frame xml:id="id88" draw:id="id88" draw:name="Google Shape;313;p19" draw:style-name="gr68" svg:width="4.071cm" svg:height="3.332cm" svg:x="13.6cm" svg:y="9.814cm">
          <draw:image xlink:href="Pictures/image3.png" xlink:type="simple" xlink:show="embed" xlink:actuate="onLoad"/>
        </draw:frame>
        <draw:frame xml:id="id89" draw:id="id89" draw:name="TextBox 7" draw:style-name="gr69" svg:width="2.986cm" svg:height="2.801cm" svg:x="9.032cm" svg:y="10.13cm">
          <draw:text-box fo:min-height="2.801cm">
            <text:p text:style-name="P134"><text:span text:style-name="T142">Value / </text:span><text:span text:style-name="T143">KPI</text:span></text:p>
            <text:p text:style-name="P135"><text:span/></text:p>
            <text:p text:style-name="P136"><text:span text:style-name="T144">Millimeter-level localization accuracy with quantified confidence intervals. Transition from qualitative checks to deterministic 3D spatial data.</text:span></text:p>
          </draw:text-box>
        </draw:frame>
        <draw:frame xml:id="id90" draw:id="id90" draw:name="TextBox 7" draw:style-name="gr70" svg:width="2.986cm" svg:height="2.801cm" svg:x="14.01cm" svg:y="10.08cm">
          <draw:text-box fo:min-height="2.801cm">
            <text:p text:style-name="P137"><text:span text:style-name="T145">Investment</text:span></text:p>
            <text:p text:style-name="P138"><text:span/></text:p>
            <text:p text:style-name="P139"><text:span text:style-name="T146">4-month PoC | 4 Work Packages.</text:span></text:p>
          </draw:text-box>
        </draw:frame>
        <draw:frame xml:id="id91" draw:id="id91" draw:style-name="gr71" svg:width="5.544cm" svg:height="3.312cm" svg:x="18.72cm" svg:y="9.757cm">
          <draw:image xlink:href="Pictures/image8.png" xlink:type="simple" xlink:show="embed" xlink:actuate="onLoad"/>
        </draw:frame>
        <draw:frame xml:id="id92" draw:id="id92" draw:style-name="gr72" svg:width="15.02cm" svg:height="4.262cm" svg:x="9.032cm" svg:y="4.502cm">
          <draw:image xlink:href="Pictures/image9.png" xlink:type="simple" xlink:show="embed" xlink:actuate="onLoad"/>
        </draw:frame>
        <draw:frame xml:id="id93" draw:id="id93" draw:style-name="gr73" draw:transform="rotate(-81.681407248005371) translate(20.54cm,13.59cm)" svg:width="3.253cm" svg:height="0.509cm">
          <draw:text-box fo:min-height="0.509cm">
            <text:p text:style-name="P140"><text:span text:style-name="T147">Fabien FURFARO (2026)</text:span></text:p>
          </draw:text-box>
        </draw:frame>
        <draw:frame xml:id="id94" draw:id="id94" draw:style-name="gr74" draw:transform="rotate(-81.681407248005371) translate(22.16cm,0.08357cm)" svg:width="3.255cm" svg:height="0.509cm">
          <draw:text-box fo:min-height="0.509cm">
            <text:p text:style-name="P141"><text:span text:style-name="T148">Fabien FURFARO (2026)</text:span></text:p>
          </draw:text-box>
        </draw:frame>
        <presentation:notes draw:style-name="dp12">
          <draw:frame xml:id="id95" draw:id="id95" draw:name="Slide Image Placeholder 1" draw:text-style-name="P142" draw:layer="layout" presentation:style-name="pr22" presentation:class="page" presentation:placeholder="true" svg:width="0.03528cm" svg:height="0.03528cm" svg:x="0cm" svg:y="0cm">
            <draw:text-box fo:min-height="0.03528cm">
              <text:p text:style-name="P143"><text:span/></text:p>
            </draw:text-box>
          </draw:frame>
          <draw:frame xml:id="id96" draw:id="id96" draw:name="Notes Placeholder 2" draw:text-style-name="P144" draw:layer="layout" presentation:style-name="pr23" presentation:class="outline" presentation:placeholder="true" svg:width="0.03528cm" svg:height="0.03528cm" svg:x="0cm" svg:y="0cm">
            <draw:text-box fo:min-height="0.03528cm">
              <text:p text:style-name="P145"><text:span/></text:p>
            </draw:text-box>
          </draw:frame>
          <draw:frame xml:id="id97" draw:id="id97" draw:name="Slide Number Placeholder 3" draw:text-style-name="P146" draw:layer="layout" presentation:style-name="pr24" presentation:class="page-number" presentation:placeholder="true" svg:width="0.03528cm" svg:height="0.03528cm" svg:x="0cm" svg:y="0cm">
            <draw:text-box fo:min-height="0.03528cm">
              <text:p text:style-name="P147"><text:span text:style-name="T149"><text:page-number/></text:span></text:p>
            </draw:text-box>
          </draw:frame>
        </presentation:notes>
      </draw:page>
      <draw:page draw:name="Slide1537" draw:style-name="dp13" draw:master-page-name="__________________________Master1-Layout1-cust-Cover-Double-Images" presentation:presentation-page-layout-name="AL1">
        <draw:custom-shape xml:id="id98" draw:id="id98" draw:style-name="gr75" draw:transform="rotate(-106.81414789494731) translate(8.629cm,4.237cm)" svg:width="15.77cm" svg:height="4.793cm">
          <text:p text:style-name="P148"><text:span/></text:p>
          <draw:enhanced-geometry draw:type="flowchart-alternate-process"/>
        </draw:custom-shape>
        <draw:frame xml:id="id99" draw:id="id99" draw:name="Espace réservé du texte 8" draw:text-style-name="P149" draw:layer="layout" presentation:style-name="pr25" presentation:class="outline" presentation:placeholder="true" svg:width="21.72cm" svg:height="0.7242cm" svg:x="0.7382cm" svg:y="0.3679cm">
          <draw:text-box fo:min-height="0.7242cm">
            <text:p text:style-name="P150"><text:span text:style-name="T150">Sovereign Edge AI for Vehicle Diagnostics</text:span></text:p>
          </draw:text-box>
        </draw:frame>
        <draw:frame xml:id="id100" draw:id="id100" draw:name="Espace réservé du texte 1" draw:text-style-name="P151" draw:layer="layout" presentation:style-name="pr26" presentation:class="outline" presentation:placeholder="true" svg:width="21.72cm" svg:height="0.4477cm" svg:x="0.7382cm" svg:y="1.222cm">
          <draw:text-box fo:min-height="0.4477cm">
            <text:p text:style-name="P152"><text:span text:style-name="T151">Secure LLM deployment for confidential automotive data (</text:span><text:span text:style-name="T152">AI Project Leader</text:span><text:span text:style-name="T153"> - Automotive)</text:span></text:p>
          </draw:text-box>
        </draw:frame>
        <draw:frame xml:id="id101" draw:id="id101" draw:name="Titre 1" draw:style-name="gr76" svg:width="6.073cm" svg:height="1.599cm" svg:x="0.8785cm" svg:y="3.438cm">
          <draw:text-box fo:min-height="1.599cm">
            <text:p text:style-name="P153"><text:span text:style-name="T154">Automated interpretation of multi-protocol vehicle telemetry (CAN / OBD-II) under strict confidentiality. Cloud-based analysis is prohibited due to industrial IP risks and data privacy mandates.</text:span></text:p>
          </draw:text-box>
        </draw:frame>
        <draw:line xml:id="id102" draw:id="id102" draw:name="Прямая соединительная линия 9" draw:style-name="gr77" svg:x1="7.679cm" svg:x2="7.679cm" svg:y1="2.865cm" svg:y2="13.87cm">
          <text:p text:style-name="P154"><text:span/></text:p>
        </draw:line>
        <draw:frame xml:id="id103" draw:id="id103" draw:name="TextBox 7" draw:style-name="gr78" svg:width="6.26cm" svg:height="0.7502cm" svg:x="0.785cm" svg:y="2.389cm">
          <draw:text-box fo:min-height="0.7502cm">
            <text:p text:style-name="P155"><text:span text:style-name="T155">Client Context &amp; Problem</text:span></text:p>
          </draw:text-box>
        </draw:frame>
        <draw:frame xml:id="id104" draw:id="id104" draw:name="TextBox 7" draw:style-name="gr79" svg:width="15.44cm" svg:height="1.794cm" svg:x="8.82cm" svg:y="2.541cm">
          <draw:text-box fo:min-height="1.794cm">
            <text:p text:style-name="P156"><text:span text:style-name="T156">Architecture</text:span></text:p>
            <text:p text:style-name="P157"><text:span/></text:p>
            <text:p text:style-name="P158"><text:span text:style-name="T157">Real-time ingestion of CAN/OBD frames via a Python-CAN and OBD parser. Data is indexed in ChromaDB for local RAG, allowing the model to perform diagnostic inference without external connectivity.</text:span></text:p>
          </draw:text-box>
        </draw:frame>
        <draw:frame xml:id="id105" draw:id="id105" draw:name="Titre 1" draw:style-name="gr80" svg:width="6.073cm" svg:height="1.599cm" svg:x="0.8785cm" svg:y="6.383cm">
          <draw:text-box fo:min-height="1.599cm">
            <text:p text:style-name="P159"><text:span text:style-name="T158">Absolute Digital Sovereignty. Secure, air-gapped diagnostic capabilities are required for sensitive industrial missions where zero cloud access is permitted.</text:span></text:p>
          </draw:text-box>
        </draw:frame>
        <draw:frame xml:id="id106" draw:id="id106" draw:name="TextBox 7" draw:style-name="gr81" svg:width="6.26cm" svg:height="0.7502cm" svg:x="0.785cm" svg:y="5.335cm">
          <draw:text-box fo:min-height="0.7502cm">
            <text:p text:style-name="P160"><text:span text:style-name="T159">Why Prioritized</text:span></text:p>
          </draw:text-box>
        </draw:frame>
        <draw:frame xml:id="id107" draw:id="id107" draw:name="Titre 1" draw:style-name="gr82" svg:width="6.166cm" svg:height="1.599cm" svg:x="0.8785cm" svg:y="9.329cm">
          <draw:text-box fo:min-height="1.599cm">
            <text:p text:style-name="P161"><text:span text:style-name="T160">Local LLM deployment using Ollama/Phi-3. A hybrid decoding pipeline translates raw hexadecimal frames and OBD-II PID codes into semantic tokens for privacy-preserving reasoning.</text:span></text:p>
          </draw:text-box>
        </draw:frame>
        <draw:frame xml:id="id108" draw:id="id108" draw:name="TextBox 7" draw:style-name="gr83" svg:width="6.26cm" svg:height="0.7502cm" svg:x="0.785cm" svg:y="8.28cm">
          <draw:text-box fo:min-height="0.7502cm">
            <text:p text:style-name="P162"><text:span text:style-name="T161">Solution &amp; Rationale</text:span></text:p>
          </draw:text-box>
        </draw:frame>
        <draw:frame xml:id="id109" draw:id="id109" draw:name="Titre 1" draw:style-name="gr84" svg:width="6.073cm" svg:height="1.599cm" svg:x="0.8785cm" svg:y="12.27cm">
          <draw:text-box fo:min-height="1.599cm">
            <text:p text:style-name="P163"><text:span text:style-name="T162">Ollama, Phi-3, ChromaDB, Python-CAN, Python-OBD, FastAPI, Docker.</text:span></text:p>
          </draw:text-box>
        </draw:frame>
        <draw:frame xml:id="id110" draw:id="id110" draw:name="TextBox 7" draw:style-name="gr85" svg:width="6.26cm" svg:height="0.7502cm" svg:x="0.785cm" svg:y="11.23cm">
          <draw:text-box fo:min-height="0.7502cm">
            <text:p text:style-name="P164"><text:span text:style-name="T163">Technologies</text:span></text:p>
          </draw:text-box>
        </draw:frame>
        <draw:frame xml:id="id111" draw:id="id111" draw:name="Google Shape;313;p19" draw:style-name="gr86" svg:width="4.071cm" svg:height="3.332cm" svg:x="8.629cm" svg:y="9.814cm">
          <draw:image xlink:href="Pictures/image3.png" xlink:type="simple" xlink:show="embed" xlink:actuate="onLoad"/>
        </draw:frame>
        <draw:frame xml:id="id112" draw:id="id112" draw:name="Google Shape;313;p19" draw:style-name="gr87" svg:width="4.071cm" svg:height="3.332cm" svg:x="13.6cm" svg:y="9.814cm">
          <draw:image xlink:href="Pictures/image3.png" xlink:type="simple" xlink:show="embed" xlink:actuate="onLoad"/>
        </draw:frame>
        <draw:frame xml:id="id113" draw:id="id113" draw:name="TextBox 7" draw:style-name="gr88" svg:width="2.986cm" svg:height="2.801cm" svg:x="9.032cm" svg:y="10.13cm">
          <draw:text-box fo:min-height="2.801cm">
            <text:p text:style-name="P165"><text:span text:style-name="T164">Value / </text:span><text:span text:style-name="T165">KPI</text:span></text:p>
            <text:p text:style-name="P166"><text:span/></text:p>
            <text:p text:style-name="P167"><text:span text:style-name="T166">Real-time vehicle diagnostics with 100% on-premise execution, securing industrial opportunities in highly restricted environments.</text:span></text:p>
          </draw:text-box>
        </draw:frame>
        <draw:frame xml:id="id114" draw:id="id114" draw:name="TextBox 7" draw:style-name="gr89" svg:width="2.986cm" svg:height="2.801cm" svg:x="14.01cm" svg:y="10.08cm">
          <draw:text-box fo:min-height="2.801cm">
            <text:p text:style-name="P168"><text:span text:style-name="T167">Investment</text:span></text:p>
            <text:p text:style-name="P169"><text:span/></text:p>
            <text:p text:style-name="P170"><text:span text:style-name="T168">5 months | Edge AI.</text:span></text:p>
          </draw:text-box>
        </draw:frame>
        <draw:frame xml:id="id115" draw:id="id115" draw:style-name="gr90" svg:width="5.312cm" svg:height="3.548cm" svg:x="18.81cm" svg:y="9.598cm">
          <draw:image xlink:href="Pictures/image10.jpg" xlink:type="simple" xlink:show="embed" xlink:actuate="onLoad"/>
        </draw:frame>
        <draw:frame xml:id="id116" draw:id="id116" draw:style-name="gr91" svg:width="9.356cm" svg:height="4.417cm" svg:x="11.86cm" svg:y="4.425cm">
          <draw:image xlink:href="Pictures/image11.png" xlink:type="simple" xlink:show="embed" xlink:actuate="onLoad"/>
        </draw:frame>
        <draw:frame xml:id="id117" draw:id="id117" draw:style-name="gr92" draw:transform="rotate(-81.681407248005371) translate(20.54cm,13.59cm)" svg:width="3.253cm" svg:height="0.509cm">
          <draw:text-box fo:min-height="0.509cm">
            <text:p text:style-name="P171"><text:span text:style-name="T169">Fabien FURFARO (2026)</text:span></text:p>
          </draw:text-box>
        </draw:frame>
        <draw:frame xml:id="id118" draw:id="id118" draw:style-name="gr93" draw:transform="rotate(-81.681407248005371) translate(22.16cm,0.08357cm)" svg:width="3.255cm" svg:height="0.509cm">
          <draw:text-box fo:min-height="0.509cm">
            <text:p text:style-name="P172"><text:span text:style-name="T170">Fabien FURFARO (2026)</text:span></text:p>
          </draw:text-box>
        </draw:frame>
        <presentation:notes draw:style-name="dp14">
          <draw:frame xml:id="id119" draw:id="id119" draw:name="Slide Image Placeholder 1" draw:text-style-name="P173" draw:layer="layout" presentation:style-name="pr27" presentation:class="page" presentation:placeholder="true" svg:width="0.03528cm" svg:height="0.03528cm" svg:x="0cm" svg:y="0cm">
            <draw:text-box fo:min-height="0.03528cm">
              <text:p text:style-name="P174"><text:span/></text:p>
            </draw:text-box>
          </draw:frame>
          <draw:frame xml:id="id120" draw:id="id120" draw:name="Notes Placeholder 2" draw:text-style-name="P175" draw:layer="layout" presentation:style-name="pr28" presentation:class="outline" presentation:placeholder="true" svg:width="0.03528cm" svg:height="0.03528cm" svg:x="0cm" svg:y="0cm">
            <draw:text-box fo:min-height="0.03528cm">
              <text:p text:style-name="P176"><text:span/></text:p>
            </draw:text-box>
          </draw:frame>
          <draw:frame xml:id="id121" draw:id="id121" draw:name="Slide Number Placeholder 3" draw:text-style-name="P177" draw:layer="layout" presentation:style-name="pr29" presentation:class="page-number" presentation:placeholder="true" svg:width="0.03528cm" svg:height="0.03528cm" svg:x="0cm" svg:y="0cm">
            <draw:text-box fo:min-height="0.03528cm">
              <text:p text:style-name="P178"><text:span text:style-name="T171"><text:page-number/></text:span></text:p>
            </draw:text-box>
          </draw:frame>
        </presentation:notes>
      </draw:page>
      <draw:page draw:name="Slide1537" draw:style-name="dp15" draw:master-page-name="__________________________Master1-Layout1-cust-Cover-Double-Images" presentation:presentation-page-layout-name="AL1">
        <draw:custom-shape xml:id="id122" draw:id="id122" draw:style-name="gr94" draw:transform="rotate(-106.81414789494731) translate(8.629cm,4.237cm)" svg:width="15.77cm" svg:height="4.793cm">
          <text:p text:style-name="P179"><text:span/></text:p>
          <draw:enhanced-geometry draw:type="flowchart-alternate-process"/>
        </draw:custom-shape>
        <draw:frame xml:id="id123" draw:id="id123" draw:name="Espace réservé du texte 8" draw:text-style-name="P180" draw:layer="layout" presentation:style-name="pr30" presentation:class="outline" presentation:placeholder="true" svg:width="21.72cm" svg:height="0.7242cm" svg:x="0.7382cm" svg:y="0.3679cm">
          <draw:text-box fo:min-height="0.7242cm">
            <text:p text:style-name="P181"><text:span text:style-name="T172">Scaling Industrial Impact Analysis with Graphs</text:span></text:p>
          </draw:text-box>
        </draw:frame>
        <draw:frame xml:id="id124" draw:id="id124" draw:name="Espace réservé du texte 1" draw:text-style-name="P182" draw:layer="layout" presentation:style-name="pr31" presentation:class="outline" presentation:placeholder="true" svg:width="21.72cm" svg:height="0.4477cm" svg:x="0.7382cm" svg:y="1.222cm">
          <draw:text-box fo:min-height="0.4477cm">
            <text:p text:style-name="P183"><text:span text:style-name="T173">Managing complex dependencies at production scale </text:span><text:span text:style-name="T174">(AI Architect – Aerospace)</text:span></text:p>
          </draw:text-box>
        </draw:frame>
        <draw:frame xml:id="id125" draw:id="id125" draw:name="Titre 1" draw:style-name="gr95" svg:width="6.073cm" svg:height="1.599cm" svg:x="0.8785cm" svg:y="3.438cm">
          <draw:text-box fo:min-height="1.599cm">
            <text:p text:style-name="P184"><text:span text:style-name="T175">Change impact analysis across multiple Bills of Materials (xBOM) is hindered by rigid relational database structures. Navigating deep recursive dependencies (10M+ nodes) causes significant performance bottlenecks.</text:span></text:p>
          </draw:text-box>
        </draw:frame>
        <draw:line xml:id="id126" draw:id="id126" draw:name="Прямая соединительная линия 9" draw:style-name="gr96" svg:x1="7.679cm" svg:x2="7.679cm" svg:y1="2.865cm" svg:y2="13.87cm">
          <text:p text:style-name="P185"><text:span/></text:p>
        </draw:line>
        <draw:frame xml:id="id127" draw:id="id127" draw:name="TextBox 7" draw:style-name="gr97" svg:width="6.26cm" svg:height="0.7502cm" svg:x="0.785cm" svg:y="2.389cm">
          <draw:text-box fo:min-height="0.7502cm">
            <text:p text:style-name="P186"><text:span text:style-name="T176">Client Context &amp; Problem</text:span></text:p>
          </draw:text-box>
        </draw:frame>
        <draw:frame xml:id="id128" draw:id="id128" draw:name="TextBox 7" draw:style-name="gr98" svg:width="15.44cm" svg:height="1.794cm" svg:x="8.82cm" svg:y="2.541cm">
          <draw:text-box fo:min-height="1.794cm">
            <text:p text:style-name="P187"><text:span text:style-name="T177">Architecture</text:span></text:p>
            <text:p text:style-name="P188"><text:span/></text:p>
            <text:p text:style-name="P189"><text:span text:style-name="T178">High-speed ingestion of xBOM data via Polars for parallelized ETL. Data is modeled into ArangoDB, where AQL (ArangoDB Query Language) performs recursive impact analysis, served via a FastAPI backend.</text:span></text:p>
          </draw:text-box>
        </draw:frame>
        <draw:frame xml:id="id129" draw:id="id129" draw:name="Titre 1" draw:style-name="gr99" svg:width="6.073cm" svg:height="1.599cm" svg:x="0.8785cm" svg:y="6.383cm">
          <draw:text-box fo:min-height="1.599cm">
            <text:p text:style-name="P190"><text:span text:style-name="T179">Risk of production line blockage. Rapidly calculating the ripple effect of a technical change is critical to maintaining industrial flow and preventing costly configuration errors.</text:span></text:p>
          </draw:text-box>
        </draw:frame>
        <draw:frame xml:id="id130" draw:id="id130" draw:name="TextBox 7" draw:style-name="gr100" svg:width="6.26cm" svg:height="0.7502cm" svg:x="0.785cm" svg:y="5.335cm">
          <draw:text-box fo:min-height="0.7502cm">
            <text:p text:style-name="P191"><text:span text:style-name="T180">Why Prioritized</text:span></text:p>
          </draw:text-box>
        </draw:frame>
        <draw:frame xml:id="id131" draw:id="id131" draw:name="Titre 1" draw:style-name="gr101" svg:width="6.166cm" svg:height="1.599cm" svg:x="0.8785cm" svg:y="9.329cm">
          <draw:text-box fo:min-height="1.599cm">
            <text:p text:style-name="P192"><text:span text:style-name="T181">Migration to a Graph Database (ArangoDB) model. This natively handles complex industrial ontologies and many-to-many relationships, enabling real-time traversal of massive dependency trees.</text:span></text:p>
          </draw:text-box>
        </draw:frame>
        <draw:frame xml:id="id132" draw:id="id132" draw:name="TextBox 7" draw:style-name="gr102" svg:width="6.26cm" svg:height="0.7502cm" svg:x="0.785cm" svg:y="8.28cm">
          <draw:text-box fo:min-height="0.7502cm">
            <text:p text:style-name="P193"><text:span text:style-name="T182">Solution &amp; Rationale</text:span></text:p>
          </draw:text-box>
        </draw:frame>
        <draw:frame xml:id="id133" draw:id="id133" draw:name="Titre 1" draw:style-name="gr103" svg:width="6.073cm" svg:height="1.599cm" svg:x="0.8785cm" svg:y="12.27cm">
          <draw:text-box fo:min-height="1.599cm">
            <text:p text:style-name="P194"><text:span text:style-name="T183">ArangoDB, Polars, FastAPI, Docker, AQL.</text:span></text:p>
          </draw:text-box>
        </draw:frame>
        <draw:frame xml:id="id134" draw:id="id134" draw:name="TextBox 7" draw:style-name="gr104" svg:width="6.26cm" svg:height="0.7502cm" svg:x="0.785cm" svg:y="11.23cm">
          <draw:text-box fo:min-height="0.7502cm">
            <text:p text:style-name="P195"><text:span text:style-name="T184">Technologies</text:span></text:p>
          </draw:text-box>
        </draw:frame>
        <draw:frame xml:id="id135" draw:id="id135" draw:name="Google Shape;313;p19" draw:style-name="gr105" svg:width="4.071cm" svg:height="3.332cm" svg:x="8.629cm" svg:y="9.814cm">
          <draw:image xlink:href="Pictures/image3.png" xlink:type="simple" xlink:show="embed" xlink:actuate="onLoad"/>
        </draw:frame>
        <draw:frame xml:id="id136" draw:id="id136" draw:name="Google Shape;313;p19" draw:style-name="gr106" svg:width="4.071cm" svg:height="3.332cm" svg:x="13.6cm" svg:y="9.814cm">
          <draw:image xlink:href="Pictures/image3.png" xlink:type="simple" xlink:show="embed" xlink:actuate="onLoad"/>
        </draw:frame>
        <draw:frame xml:id="id137" draw:id="id137" draw:name="TextBox 7" draw:style-name="gr107" svg:width="2.986cm" svg:height="2.801cm" svg:x="9.032cm" svg:y="10.13cm">
          <draw:text-box fo:min-height="2.801cm">
            <text:p text:style-name="P196"><text:span text:style-name="T185">Value / </text:span><text:span text:style-name="T186">KPI</text:span></text:p>
            <text:p text:style-name="P197"><text:span/></text:p>
            <text:p text:style-name="P198"><text:span text:style-name="T187">Full automation of configuration delta calculations and reduction in manual cross-referencing errors.</text:span></text:p>
          </draw:text-box>
        </draw:frame>
        <draw:frame xml:id="id138" draw:id="id138" draw:name="TextBox 7" draw:style-name="gr108" svg:width="2.986cm" svg:height="2.801cm" svg:x="14.01cm" svg:y="10.08cm">
          <draw:text-box fo:min-height="2.801cm">
            <text:p text:style-name="P199"><text:span text:style-name="T188">Investment</text:span></text:p>
            <text:p text:style-name="P200"><text:span/></text:p>
            <text:p text:style-name="P201"><text:span text:style-name="T189">5-month development cycle | High-scale Data Engineering.</text:span></text:p>
          </draw:text-box>
        </draw:frame>
        <draw:frame xml:id="id139" draw:id="id139" draw:style-name="gr109" svg:width="5.794cm" svg:height="3.498cm" svg:x="18.61cm" svg:y="9.572cm">
          <draw:image xlink:href="Pictures/image12.jpg" xlink:type="simple" xlink:show="embed" xlink:actuate="onLoad"/>
        </draw:frame>
        <draw:frame xml:id="id140" draw:id="id140" draw:style-name="gr110" svg:width="15.27cm" svg:height="2.579cm" svg:x="8.877cm" svg:y="5.403cm">
          <draw:image xlink:href="Pictures/image13.png" xlink:type="simple" xlink:show="embed" xlink:actuate="onLoad"/>
        </draw:frame>
        <draw:frame xml:id="id141" draw:id="id141" draw:style-name="gr111" draw:transform="rotate(-81.681407248005371) translate(20.54cm,13.59cm)" svg:width="3.253cm" svg:height="0.509cm">
          <draw:text-box fo:min-height="0.509cm">
            <text:p text:style-name="P202"><text:span text:style-name="T190">Fabien FURFARO (2026)</text:span></text:p>
          </draw:text-box>
        </draw:frame>
        <draw:frame xml:id="id142" draw:id="id142" draw:style-name="gr112" draw:transform="rotate(-81.681407248005371) translate(22.16cm,0.08357cm)" svg:width="3.255cm" svg:height="0.509cm">
          <draw:text-box fo:min-height="0.509cm">
            <text:p text:style-name="P203"><text:span text:style-name="T191">Fabien FURFARO (2026)</text:span></text:p>
          </draw:text-box>
        </draw:frame>
        <presentation:notes draw:style-name="dp16">
          <draw:frame xml:id="id143" draw:id="id143" draw:name="Slide Image Placeholder 1" draw:text-style-name="P204" draw:layer="layout" presentation:style-name="pr32" presentation:class="page" presentation:placeholder="true" svg:width="0.03528cm" svg:height="0.03528cm" svg:x="0cm" svg:y="0cm">
            <draw:text-box fo:min-height="0.03528cm">
              <text:p text:style-name="P205"><text:span/></text:p>
            </draw:text-box>
          </draw:frame>
          <draw:frame xml:id="id144" draw:id="id144" draw:name="Notes Placeholder 2" draw:text-style-name="P206" draw:layer="layout" presentation:style-name="pr33" presentation:class="outline" presentation:placeholder="true" svg:width="0.03528cm" svg:height="0.03528cm" svg:x="0cm" svg:y="0cm">
            <draw:text-box fo:min-height="0.03528cm">
              <text:p text:style-name="P207"><text:span/></text:p>
            </draw:text-box>
          </draw:frame>
          <draw:frame xml:id="id145" draw:id="id145" draw:name="Slide Number Placeholder 3" draw:text-style-name="P208" draw:layer="layout" presentation:style-name="pr34" presentation:class="page-number" presentation:placeholder="true" svg:width="0.03528cm" svg:height="0.03528cm" svg:x="0cm" svg:y="0cm">
            <draw:text-box fo:min-height="0.03528cm">
              <text:p text:style-name="P209"><text:span text:style-name="T192"><text:page-number/></text:span></text:p>
            </draw:text-box>
          </draw:frame>
        </presentation:notes>
      </draw:page>
      <draw:page draw:name="Slide1537" draw:style-name="dp17" draw:master-page-name="__________________________Master1-Layout1-cust-Cover-Double-Images" presentation:presentation-page-layout-name="AL1">
        <draw:custom-shape xml:id="id146" draw:id="id146" draw:style-name="gr113" draw:transform="rotate(-106.81414789494731) translate(8.629cm,4.237cm)" svg:width="15.77cm" svg:height="4.793cm">
          <text:p text:style-name="P210"><text:span/></text:p>
          <draw:enhanced-geometry draw:type="flowchart-alternate-process"/>
        </draw:custom-shape>
        <draw:frame xml:id="id147" draw:id="id147" draw:name="Espace réservé du texte 1" draw:text-style-name="P211" draw:layer="layout" presentation:style-name="pr35" presentation:class="outline" presentation:placeholder="true" svg:width="21.72cm" svg:height="0.4477cm" svg:x="0.7382cm" svg:y="1.222cm">
          <draw:text-box fo:min-height="0.4477cm">
            <text:p text:style-name="P212"><text:span text:style-name="T193">Building reliable and auditable GenAI systems (</text:span><text:span text:style-name="T194">AI Tech Lead &amp; Architect – </text:span><text:span text:style-name="T195">AI Factory)</text:span></text:p>
          </draw:text-box>
        </draw:frame>
        <draw:frame xml:id="id148" draw:id="id148" draw:name="Titre 1" draw:style-name="gr114" svg:width="6.073cm" svg:height="1.599cm" svg:x="0.8785cm" svg:y="3.438cm">
          <draw:text-box fo:min-height="1.599cm">
            <text:p text:style-name="P213"><text:span text:style-name="T196">Transitioning from stochastic PoCs to production-grade services often accumulates technical debt. Scaling requires addressing non-deterministic model behaviors and the lack of type-safety in agentic workflows.</text:span></text:p>
          </draw:text-box>
        </draw:frame>
        <draw:line xml:id="id149" draw:id="id149" draw:name="Прямая соединительная линия 9" draw:style-name="gr115" svg:x1="7.679cm" svg:x2="7.679cm" svg:y1="2.865cm" svg:y2="13.87cm">
          <text:p text:style-name="P214"><text:span/></text:p>
        </draw:line>
        <draw:frame xml:id="id150" draw:id="id150" draw:name="TextBox 7" draw:style-name="gr116" svg:width="6.26cm" svg:height="0.7502cm" svg:x="0.785cm" svg:y="2.389cm">
          <draw:text-box fo:min-height="0.7502cm">
            <text:p text:style-name="P215"><text:span text:style-name="T197">Client Context &amp; Problem</text:span></text:p>
          </draw:text-box>
        </draw:frame>
        <draw:frame xml:id="id151" draw:id="id151" draw:name="TextBox 7" draw:style-name="gr117" svg:width="15.44cm" svg:height="1.794cm" svg:x="8.82cm" svg:y="2.541cm">
          <draw:text-box fo:min-height="1.794cm">
            <text:p text:style-name="P216"><text:span text:style-name="T198">Architecture</text:span></text:p>
            <text:p text:style-name="P217"><text:span/></text:p>
            <text:p text:style-name="P218"><text:span text:style-name="T199">Containerized stack where OpenHands manages autonomous tasks. Logic built with PydanticAI for runtime validation of model outputs. Inference via vLLM on Kubernetes, monitored by Arize Phoenix and DeepEval for RAG quality and alignment.</text:span></text:p>
          </draw:text-box>
        </draw:frame>
        <draw:frame xml:id="id152" draw:id="id152" draw:name="Titre 1" draw:style-name="gr118" svg:width="6.073cm" svg:height="1.599cm" svg:x="0.8785cm" svg:y="6.383cm">
          <draw:text-box fo:min-height="1.599cm">
            <text:p text:style-name="P219"><text:span text:style-name="T200">Requirement for auditable AI lifecycles to ensure secure and resilient GenAI deployments under enterprise-grade loads.</text:span></text:p>
          </draw:text-box>
        </draw:frame>
        <draw:frame xml:id="id153" draw:id="id153" draw:name="TextBox 7" draw:style-name="gr119" svg:width="6.26cm" svg:height="0.7502cm" svg:x="0.785cm" svg:y="5.335cm">
          <draw:text-box fo:min-height="0.7502cm">
            <text:p text:style-name="P220"><text:span text:style-name="T201">Why Prioritized</text:span></text:p>
          </draw:text-box>
        </draw:frame>
        <draw:frame xml:id="id154" draw:id="id154" draw:name="Titre 1" draw:style-name="gr120" svg:width="6.166cm" svg:height="1.599cm" svg:x="0.8785cm" svg:y="9.329cm">
          <draw:text-box fo:min-height="1.599cm">
            <text:p text:style-name="P221"><text:span text:style-name="T202">Engineering framework based on SOLID principles and TDD. Implementation of Agentic DevOps: using PydanticAI for schema-enforced, type-safe reasoning and OpenHands within Docker sandboxes to automate development and deployment tasks.</text:span></text:p>
          </draw:text-box>
        </draw:frame>
        <draw:frame xml:id="id155" draw:id="id155" draw:name="TextBox 7" draw:style-name="gr121" svg:width="6.26cm" svg:height="0.7502cm" svg:x="0.785cm" svg:y="8.28cm">
          <draw:text-box fo:min-height="0.7502cm">
            <text:p text:style-name="P222"><text:span text:style-name="T203">Solution &amp; Rationale</text:span></text:p>
          </draw:text-box>
        </draw:frame>
        <draw:frame xml:id="id156" draw:id="id156" draw:name="Titre 1" draw:style-name="gr122" svg:width="6.073cm" svg:height="1.599cm" svg:x="0.8785cm" svg:y="12.27cm">
          <draw:text-box fo:min-height="1.599cm">
            <text:p text:style-name="P223"><text:span text:style-name="T204">PydanticAI, OpenHands, Kubernetes, vLLM, Docker, Arize Phoenix, DeepEval, GitLab CI.</text:span></text:p>
          </draw:text-box>
        </draw:frame>
        <draw:frame xml:id="id157" draw:id="id157" draw:name="TextBox 7" draw:style-name="gr123" svg:width="6.26cm" svg:height="0.7502cm" svg:x="0.785cm" svg:y="11.23cm">
          <draw:text-box fo:min-height="0.7502cm">
            <text:p text:style-name="P224"><text:span text:style-name="T205">Technologies</text:span></text:p>
          </draw:text-box>
        </draw:frame>
        <draw:frame xml:id="id158" draw:id="id158" draw:name="Google Shape;313;p19" draw:style-name="gr124" svg:width="4.071cm" svg:height="3.332cm" svg:x="8.629cm" svg:y="9.814cm">
          <draw:image xlink:href="Pictures/image3.png" xlink:type="simple" xlink:show="embed" xlink:actuate="onLoad"/>
        </draw:frame>
        <draw:frame xml:id="id159" draw:id="id159" draw:name="Google Shape;313;p19" draw:style-name="gr125" svg:width="4.071cm" svg:height="3.332cm" svg:x="13.6cm" svg:y="9.814cm">
          <draw:image xlink:href="Pictures/image3.png" xlink:type="simple" xlink:show="embed" xlink:actuate="onLoad"/>
        </draw:frame>
        <draw:frame xml:id="id160" draw:id="id160" draw:name="TextBox 7" draw:style-name="gr126" svg:width="2.986cm" svg:height="2.801cm" svg:x="9.032cm" svg:y="10.13cm">
          <draw:text-box fo:min-height="2.801cm">
            <text:p text:style-name="P225"><text:span text:style-name="T206">Value / </text:span><text:span text:style-name="T207">KPI</text:span></text:p>
            <text:p text:style-name="P226"><text:span/></text:p>
            <text:p text:style-name="P227"><text:span text:style-name="T208">R</text:span><text:span text:style-name="T209">eduction in Time-to-Market</text:span><text:span text:style-name="T210"> (goal)</text:span><text:span text:style-name="T211">. Long-term operational sustainability through standardized architectures and technical mentorship.</text:span></text:p>
          </draw:text-box>
        </draw:frame>
        <draw:frame xml:id="id161" draw:id="id161" draw:name="TextBox 7" draw:style-name="gr127" svg:width="2.986cm" svg:height="2.801cm" svg:x="14.01cm" svg:y="10.08cm">
          <draw:text-box fo:min-height="2.801cm">
            <text:p text:style-name="P228"><text:span text:style-name="T212">Investment</text:span></text:p>
            <text:p text:style-name="P229"><text:span/></text:p>
            <text:p text:style-name="P230"><text:span text:style-name="T213">6-month Architect mandate.</text:span><text:span text:style-name="T214"> (in progress)</text:span></text:p>
          </draw:text-box>
        </draw:frame>
        <draw:frame xml:id="id162" draw:id="id162" draw:name="Espace réservé du texte 8" draw:style-name="gr128" svg:width="21.72cm" svg:height="0.7242cm" svg:x="0.7382cm" svg:y="0.3679cm">
          <draw:text-box fo:min-height="0.7242cm">
            <text:p text:style-name="P231"><text:span text:style-name="T215">Industrializing AI at Scale</text:span></text:p>
          </draw:text-box>
        </draw:frame>
        <draw:frame xml:id="id163" draw:id="id163" draw:style-name="gr129" svg:width="5.088cm" svg:height="3.588cm" svg:x="18.87cm" svg:y="9.558cm">
          <draw:image xlink:href="Pictures/image14.png" xlink:type="simple" xlink:show="embed" xlink:actuate="onLoad"/>
        </draw:frame>
        <draw:frame xml:id="id164" draw:id="id164" draw:style-name="gr130" svg:width="14.84cm" svg:height="2.226cm" svg:x="9.032cm" svg:y="5.521cm">
          <draw:image xlink:href="Pictures/image15.png" xlink:type="simple" xlink:show="embed" xlink:actuate="onLoad"/>
        </draw:frame>
        <draw:frame xml:id="id165" draw:id="id165" draw:style-name="gr131" draw:transform="rotate(-81.681407248005371) translate(20.54cm,13.59cm)" svg:width="3.253cm" svg:height="0.509cm">
          <draw:text-box fo:min-height="0.509cm">
            <text:p text:style-name="P232"><text:span text:style-name="T216">Fabien FURFARO (2026)</text:span></text:p>
          </draw:text-box>
        </draw:frame>
        <draw:frame xml:id="id166" draw:id="id166" draw:style-name="gr132" draw:transform="rotate(-81.681407248005371) translate(22.16cm,0.08357cm)" svg:width="3.255cm" svg:height="0.509cm">
          <draw:text-box fo:min-height="0.509cm">
            <text:p text:style-name="P233"><text:span text:style-name="T217">Fabien FURFARO (2026)</text:span></text:p>
          </draw:text-box>
        </draw:frame>
        <presentation:notes draw:style-name="dp18">
          <draw:frame xml:id="id167" draw:id="id167" draw:name="Slide Image Placeholder 1" draw:text-style-name="P234" draw:layer="layout" presentation:style-name="pr36" presentation:class="page" presentation:placeholder="true" svg:width="0.03528cm" svg:height="0.03528cm" svg:x="0cm" svg:y="0cm">
            <draw:text-box fo:min-height="0.03528cm">
              <text:p text:style-name="P235"><text:span/></text:p>
            </draw:text-box>
          </draw:frame>
          <draw:frame xml:id="id168" draw:id="id168" draw:name="Notes Placeholder 2" draw:text-style-name="P236" draw:layer="layout" presentation:style-name="pr37" presentation:class="outline" presentation:placeholder="true" svg:width="0.03528cm" svg:height="0.03528cm" svg:x="0cm" svg:y="0cm">
            <draw:text-box fo:min-height="0.03528cm">
              <text:p text:style-name="P237"><text:span/></text:p>
            </draw:text-box>
          </draw:frame>
          <draw:frame xml:id="id169" draw:id="id169" draw:name="Slide Number Placeholder 3" draw:text-style-name="P238" draw:layer="layout" presentation:style-name="pr38" presentation:class="page-number" presentation:placeholder="true" svg:width="0.03528cm" svg:height="0.03528cm" svg:x="0cm" svg:y="0cm">
            <draw:text-box fo:min-height="0.03528cm">
              <text:p text:style-name="P239"><text:span text:style-name="T218"><text:page-number/></text:span></text:p>
            </draw:text-box>
          </draw:frame>
        </presentation:notes>
      </draw:page>
      <draw:page draw:name="Slide1537" draw:style-name="dp19" draw:master-page-name="__________________________Master1-Layout1-cust-Cover-Double-Images" presentation:presentation-page-layout-name="AL1">
        <draw:custom-shape xml:id="id170" draw:id="id170" draw:style-name="gr133" draw:transform="rotate(-106.81414789494731) translate(8.629cm,4.237cm)" svg:width="15.77cm" svg:height="4.793cm">
          <text:p text:style-name="P240"><text:span/></text:p>
          <draw:enhanced-geometry draw:type="flowchart-alternate-process"/>
        </draw:custom-shape>
        <draw:frame xml:id="id171" draw:id="id171" draw:name="Espace réservé du texte 1" draw:text-style-name="P241" draw:layer="layout" presentation:style-name="pr39" presentation:class="outline" presentation:placeholder="true" svg:width="21.72cm" svg:height="0.4477cm" svg:x="0.7382cm" svg:y="1.222cm">
          <draw:text-box fo:min-height="0.4477cm">
            <text:p text:style-name="P242"><text:span text:style-name="T219">Real-time VLA orchestration for autonomous vehicle control (</text:span><text:span text:style-name="T220">AI Architect – </text:span><text:span text:style-name="T221">AI Factory)</text:span></text:p>
          </draw:text-box>
        </draw:frame>
        <draw:frame xml:id="id172" draw:id="id172" draw:name="Titre 1" draw:style-name="gr134" svg:width="6.073cm" svg:height="1.599cm" svg:x="0.8785cm" svg:y="3.438cm">
          <draw:text-box fo:min-height="1.599cm">
            <text:p text:style-name="P243"><text:span text:style-name="T222">Integrating Vision-Language-Action (VLA) policies into robotic hardware often introduces prohibitive latency. Traditional middleware overhead prevents the fluid execution of natural language instructions in dynamic environments.</text:span></text:p>
          </draw:text-box>
        </draw:frame>
        <draw:line xml:id="id173" draw:id="id173" draw:name="Прямая соединительная линия 9" draw:style-name="gr135" svg:x1="7.679cm" svg:x2="7.679cm" svg:y1="2.865cm" svg:y2="13.87cm">
          <text:p text:style-name="P244"><text:span/></text:p>
        </draw:line>
        <draw:frame xml:id="id174" draw:id="id174" draw:name="TextBox 7" draw:style-name="gr136" svg:width="6.26cm" svg:height="0.7502cm" svg:x="0.785cm" svg:y="2.389cm">
          <draw:text-box fo:min-height="0.7502cm">
            <text:p text:style-name="P245"><text:span text:style-name="T223">Client Context &amp; Problem</text:span></text:p>
          </draw:text-box>
        </draw:frame>
        <draw:frame xml:id="id175" draw:id="id175" draw:name="TextBox 7" draw:style-name="gr137" svg:width="15.44cm" svg:height="1.794cm" svg:x="8.82cm" svg:y="2.541cm">
          <draw:text-box fo:min-height="1.794cm">
            <text:p text:style-name="P246"><text:span text:style-name="T224">Architecture</text:span></text:p>
            <text:p text:style-name="P247"><text:span/></text:p>
            <text:p text:style-name="P248"><text:span text:style-name="T225">Hierarchical control loop where the VLA-Brain processes multi-modal inputs. The system interfaces with the Genesis Physics Engine for high-fidelity simulation, utilizing dora-rs for efficient message passing between the control terminal and the physical actuators.</text:span></text:p>
          </draw:text-box>
        </draw:frame>
        <draw:frame xml:id="id176" draw:id="id176" draw:name="Titre 1" draw:style-name="gr138" svg:width="6.073cm" svg:height="1.599cm" svg:x="0.8785cm" svg:y="6.383cm">
          <draw:text-box fo:min-height="1.599cm">
            <text:p text:style-name="P249"><text:span text:style-name="T226">High-stakes R&amp;D for autonomous control. The objective is to achieve low-latency, end-to-end robotic autonomy where high-level linguistic commands are translated into precise physical actions in real-time.</text:span></text:p>
          </draw:text-box>
        </draw:frame>
        <draw:frame xml:id="id177" draw:id="id177" draw:name="TextBox 7" draw:style-name="gr139" svg:width="6.26cm" svg:height="0.7502cm" svg:x="0.785cm" svg:y="5.335cm">
          <draw:text-box fo:min-height="0.7502cm">
            <text:p text:style-name="P250"><text:span text:style-name="T227">Why Prioritized</text:span></text:p>
          </draw:text-box>
        </draw:frame>
        <draw:frame xml:id="id178" draw:id="id178" draw:name="Titre 1" draw:style-name="gr140" svg:width="6.166cm" svg:height="1.599cm" svg:x="0.8785cm" svg:y="9.329cm">
          <draw:text-box fo:min-height="1.599cm">
            <text:p text:style-name="P251"><text:span text:style-name="T228">Orchestration via dora-rs for its high-performance, zero-copy communication capabilities. This is paired with a SmolVLA policy (LeRobot) to maintain a small memory footprint while ensuring rapid inference on edge hardware.</text:span></text:p>
          </draw:text-box>
        </draw:frame>
        <draw:frame xml:id="id179" draw:id="id179" draw:name="TextBox 7" draw:style-name="gr141" svg:width="6.26cm" svg:height="0.7502cm" svg:x="0.785cm" svg:y="8.28cm">
          <draw:text-box fo:min-height="0.7502cm">
            <text:p text:style-name="P252"><text:span text:style-name="T229">Solution &amp; Rationale</text:span></text:p>
          </draw:text-box>
        </draw:frame>
        <draw:frame xml:id="id180" draw:id="id180" draw:name="Titre 1" draw:style-name="gr142" svg:width="6.073cm" svg:height="1.599cm" svg:x="0.8785cm" svg:y="12.27cm">
          <draw:text-box fo:min-height="1.599cm">
            <text:p text:style-name="P253"><text:span text:style-name="T230">dora-rs, Genesis Physics Engine, PyTorch, LeRobot (SmolVLA), Docker, uv.</text:span></text:p>
          </draw:text-box>
        </draw:frame>
        <draw:frame xml:id="id181" draw:id="id181" draw:name="TextBox 7" draw:style-name="gr143" svg:width="6.26cm" svg:height="0.7502cm" svg:x="0.785cm" svg:y="11.23cm">
          <draw:text-box fo:min-height="0.7502cm">
            <text:p text:style-name="P254"><text:span text:style-name="T231">Technologies</text:span></text:p>
          </draw:text-box>
        </draw:frame>
        <draw:frame xml:id="id182" draw:id="id182" draw:name="Google Shape;313;p19" draw:style-name="gr144" svg:width="4.071cm" svg:height="3.332cm" svg:x="8.629cm" svg:y="9.814cm">
          <draw:image xlink:href="Pictures/image3.png" xlink:type="simple" xlink:show="embed" xlink:actuate="onLoad"/>
        </draw:frame>
        <draw:frame xml:id="id183" draw:id="id183" draw:name="Google Shape;313;p19" draw:style-name="gr145" svg:width="4.071cm" svg:height="3.332cm" svg:x="13.6cm" svg:y="9.814cm">
          <draw:image xlink:href="Pictures/image3.png" xlink:type="simple" xlink:show="embed" xlink:actuate="onLoad"/>
        </draw:frame>
        <draw:frame xml:id="id184" draw:id="id184" draw:name="TextBox 7" draw:style-name="gr146" svg:width="2.986cm" svg:height="2.801cm" svg:x="9.032cm" svg:y="10.13cm">
          <draw:text-box fo:min-height="2.801cm">
            <text:p text:style-name="P255"><text:span text:style-name="T232">Value / </text:span><text:span text:style-name="T233">KPI</text:span></text:p>
            <text:p text:style-name="P256"><text:span/></text:p>
            <text:p text:style-name="P257"><text:span text:style-name="T234">Achieved a stable closed-loop control pipeline at 20Hz (50ms latency).</text:span></text:p>
          </draw:text-box>
        </draw:frame>
        <draw:frame xml:id="id185" draw:id="id185" draw:name="TextBox 7" draw:style-name="gr147" svg:width="2.986cm" svg:height="2.801cm" svg:x="14.01cm" svg:y="10.08cm">
          <draw:text-box fo:min-height="2.801cm">
            <text:p text:style-name="P258"><text:span text:style-name="T235">Investment</text:span></text:p>
            <text:p text:style-name="P259"><text:span/></text:p>
            <text:p text:style-name="P260"><text:span text:style-name="T236">Agile R&amp;D Project | Full-stack Robotics &amp; AI.</text:span><text:span text:style-name="T237"> (In progress)</text:span></text:p>
          </draw:text-box>
        </draw:frame>
        <draw:frame xml:id="id186" draw:id="id186" draw:name="Espace réservé du texte 8" draw:style-name="gr148" svg:width="21.72cm" svg:height="0.7242cm" svg:x="0.7382cm" svg:y="0.3679cm">
          <draw:text-box fo:min-height="0.7242cm">
            <text:p text:style-name="P261"><text:span text:style-name="T238">Accelerated Dynamics for Robotic Autonomy</text:span></text:p>
          </draw:text-box>
        </draw:frame>
        <draw:frame xml:id="id187" draw:id="id187" draw:style-name="gr149" svg:width="5.197cm" svg:height="3.462cm" svg:x="18.74cm" svg:y="9.684cm">
          <draw:image xlink:href="Pictures/image16.png" xlink:type="simple" xlink:show="embed" xlink:actuate="onLoad"/>
        </draw:frame>
        <draw:frame xml:id="id188" draw:id="id188" draw:style-name="gr150" svg:width="14.04cm" svg:height="4.103cm" svg:x="9.52cm" svg:y="4.582cm">
          <draw:image xlink:href="Pictures/image17.png" xlink:type="simple" xlink:show="embed" xlink:actuate="onLoad"/>
        </draw:frame>
        <draw:frame xml:id="id189" draw:id="id189" draw:style-name="gr151" draw:transform="rotate(-81.681407248005371) translate(20.54cm,13.59cm)" svg:width="3.253cm" svg:height="0.509cm">
          <draw:text-box fo:min-height="0.509cm">
            <text:p text:style-name="P262"><text:span text:style-name="T239">Fabien FURFARO (2026)</text:span></text:p>
          </draw:text-box>
        </draw:frame>
        <draw:frame xml:id="id190" draw:id="id190" draw:style-name="gr152" draw:transform="rotate(-81.681407248005371) translate(22.16cm,0.08357cm)" svg:width="3.255cm" svg:height="0.509cm">
          <draw:text-box fo:min-height="0.509cm">
            <text:p text:style-name="P263"><text:span text:style-name="T240">Fabien FURFARO (2026)</text:span></text:p>
          </draw:text-box>
        </draw:frame>
        <presentation:notes draw:style-name="dp20">
          <draw:frame xml:id="id191" draw:id="id191" draw:name="Slide Image Placeholder 1" draw:text-style-name="P264" draw:layer="layout" presentation:style-name="pr40" presentation:class="page" presentation:placeholder="true" svg:width="0.03528cm" svg:height="0.03528cm" svg:x="0cm" svg:y="0cm">
            <draw:text-box fo:min-height="0.03528cm">
              <text:p text:style-name="P265"><text:span/></text:p>
            </draw:text-box>
          </draw:frame>
          <draw:frame xml:id="id192" draw:id="id192" draw:name="Notes Placeholder 2" draw:text-style-name="P266" draw:layer="layout" presentation:style-name="pr41" presentation:class="outline" presentation:placeholder="true" svg:width="0.03528cm" svg:height="0.03528cm" svg:x="0cm" svg:y="0cm">
            <draw:text-box fo:min-height="0.03528cm">
              <text:p text:style-name="P267"><text:span/></text:p>
            </draw:text-box>
          </draw:frame>
          <draw:frame xml:id="id193" draw:id="id193" draw:name="Slide Number Placeholder 3" draw:text-style-name="P268" draw:layer="layout" presentation:style-name="pr42" presentation:class="page-number" presentation:placeholder="true" svg:width="0.03528cm" svg:height="0.03528cm" svg:x="0cm" svg:y="0cm">
            <draw:text-box fo:min-height="0.03528cm">
              <text:p text:style-name="P269"><text:span text:style-name="T241"><text:page-number/></text:span></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graphic">
      <style:paragraph-properties/>
      <style:text-properties/>
    </style:default-style>
    <style:default-style style:family="paragraph">
      <style:paragraph-properties/>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draw:gradient draw:start-color="#063C67" draw:end-color="#1D93C9" draw:end-intensity="100%" draw:start-intensity="100%" draw:border="0%" draw:angle="90deg" draw:style="linear" draw:name="Gradient1" draw:display_name="UserGradient1">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2" draw:display_name="UserGradient2">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3" draw:display_name="UserGradient3">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4" draw:display_name="UserGradient4">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5" draw:display_name="UserGradient5">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6" draw:display_name="UserGradient6">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7" draw:display_name="UserGradient7">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8" draw:display_name="UserGradient8">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9" draw:display_name="UserGradient9">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10" draw:display_name="UserGradient10">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11" draw:display_name="UserGradient11">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12" draw:display_name="UserGradient12">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13" draw:display_name="UserGradient13">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14" draw:display_name="UserGradient14">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15" draw:display_name="UserGradient15">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16" draw:display_name="UserGradient16">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17" draw:display_name="UserGradient17">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18" draw:display_name="UserGradient18">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19" draw:display_name="UserGradient19">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20" draw:display_name="UserGradient20">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21" draw:display_name="UserGradient21">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22" draw:display_name="UserGradient22">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23" draw:display_name="UserGradient23">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24" draw:display_name="UserGradient24">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25" draw:display_name="UserGradient25">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26" draw:display_name="UserGradient26">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27" draw:display_name="UserGradient27">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28" draw:display_name="UserGradient28">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29" draw:display_name="UserGradient29">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30" draw:display_name="UserGradient30">
      <loext:gradient-stop loext:color-type="rgb" loext:color-value="#1D93C9" svg:offset="1"/>
      <loext:gradient-stop loext:color-type="rgb" loext:color-value="#063C67" svg:offset="0"/>
    </draw:gradient>
    <draw:gradient draw:start-color="#063C67" draw:end-color="#1D93C9" draw:end-intensity="100%" draw:start-intensity="100%" draw:border="0%" draw:angle="90deg" draw:style="linear" draw:name="Gradient31" draw:display_name="UserGradient31">
      <loext:gradient-stop loext:color-type="rgb" loext:color-value="#1D93C9" svg:offset="1"/>
      <loext:gradient-stop loext:color-type="rgb" loext:color-value="#063C67" svg:offset="0"/>
    </draw:gradient>
    <style:presentation-page-layout style:name="AL1">
      <presentation:placeholder presentation:object="outline" svg:height="12.54cm" svg:width="16.43cm" svg:x="0cm" svg:y="0cm" draw:text-style-name="P1"/>
      <presentation:placeholder presentation:object="outline" svg:height="12.57cm" svg:width="19.12cm" svg:x="6.297cm" svg:y="-0.00377cm" draw:text-style-name="P2"/>
      <presentation:placeholder presentation:object="outline" svg:height="0.7242cm" svg:width="2.928cm" svg:x="21.6cm" svg:y="13.15cm" draw:text-style-name="P3"/>
      <presentation:placeholder presentation:object="outline" svg:height="0.9105cm" svg:width="9.819cm" svg:x="0.8704cm" svg:y="13.06cm" draw:text-style-name="P4"/>
    </style:presentation-page-layout>
    <style:presentation-page-layout style:name="AL2">
      <presentation:placeholder presentation:object="outline" svg:height="0.7242cm" svg:width="21.72cm" svg:x="0.7382cm" svg:y="0.3679cm" draw:text-style-name="P5"/>
      <presentation:placeholder presentation:object="outline" svg:height="0.4477cm" svg:width="21.72cm" svg:x="0.7382cm" svg:y="1.222cm" draw:text-style-name="P6"/>
    </style:presentation-page-layout>
    <style:style style:family="graphic" style:name="Frame">
      <style:graphic-properties/>
      <style:text-properties/>
    </style:style>
    <text:list-style style:name="L1"/>
    <text:list-style style:name="L2"/>
    <text:list-style style:name="L3"/>
    <text:list-style style:name="L4"/>
    <text:list-style style:name="L5"/>
    <text:list-style style:name="L6"/>
    <text:list-style style:name="L7"/>
    <text:list-style style:name="L8"/>
    <text:list-style style:name="L9"/>
    <text:list-style style:name="L10"/>
    <text:list-style style:name="L11"/>
    <text:list-style style:name="L12"/>
  </office:styles>
  <office:automatic-styles>
    <style:page-layout style:name="Mpm1">
      <style:page-layout-properties fo:page-width="25.4cm" fo:page-height="14.29cm"/>
    </style:page-layout>
    <style:page-layout style:name="Mpm2">
      <style:page-layout-properties fo:page-width="19.05cm" fo:page-height="25.4cm"/>
    </style:page-layout>
    <style:style style:family="drawing-page" style:name="dp1">
      <style:drawing-page-properties/>
    </style:style>
    <style:style style:family="paragraph" style:name="P1">
      <style:paragraph-properties/>
      <style:text-properties/>
    </style:style>
    <style:style style:family="paragraph" style:name="P2">
      <style:paragraph-properties/>
      <style:text-properties/>
    </style:style>
    <style:style style:family="paragraph" style:name="P3">
      <style:paragraph-properties/>
      <style:text-properties/>
    </style:style>
    <style:style style:family="paragraph" style:name="P4">
      <style:paragraph-properties/>
      <style:text-properties/>
    </style:style>
    <style:style style:family="drawing-page" style:name="dp2">
      <style:drawing-page-properties/>
    </style:style>
    <style:style style:family="paragraph" style:name="P5">
      <style:paragraph-properties/>
      <style:text-properties/>
    </style:style>
    <style:style style:family="paragraph" style:name="P6">
      <style:paragraph-properties/>
      <style:text-properties/>
    </style:style>
    <style:style style:family="drawing-page" style:name="dp3">
      <style:drawing-page-properties draw:fill-color="#FFFFFF" draw:fill="solid"/>
    </style:style>
    <style:style style:family="graphic" style:name="gr2">
      <style:graphic-properties draw:fill-color="#FFFFFF" draw:fill="solid" draw:textarea-vertical-align="middle" draw:auto-grow-height="false" draw:auto-grow-width="false" draw:stroke="none" fo:padding-top="3.6pt" fo:padding-bottom="3.6pt" fo:padding-left="7.2pt" fo:padding-right="7.2pt"/>
    </style:style>
    <style:style style:family="paragraph" style:name="P7">
      <style:paragraph-properties/>
      <style:text-properties/>
    </style:style>
    <style:style style:parent-style-name="Graphics" style:family="graphic" style:name="gr3">
      <style:graphic-properties draw:image-opacity="67%" style:repeat="stretch" draw:stroke="none" style:wrap="run-through" fo:background-color="transparent"/>
    </style:style>
    <style:style style:family="presentation" style:name="pr1">
      <style:graphic-properties draw:fill="none" draw:textarea-vertical-align="top" draw:auto-grow-height="false" draw:auto-grow-width="false" draw:stroke="none" style:wrap="run-through" fo:padding-top="3.6pt" fo:padding-bottom="3.6pt" fo:padding-left="7.2pt" fo:padding-right="7.2pt" fo:background-color="transparent"/>
    </style:style>
    <style:style style:family="paragraph" style:name="P8">
      <style:paragraph-properties/>
      <style:text-properties/>
    </style:style>
    <style:style style:family="paragraph" style:name="P9">
      <style:paragraph-properties/>
      <style:text-properties/>
    </style:style>
    <style:style style:family="presentation" style:name="pr2">
      <style:graphic-properties draw:fill="none" draw:textarea-vertical-align="top" draw:auto-grow-height="false" draw:auto-grow-width="false" draw:stroke="none" style:wrap="run-through" fo:padding-top="3.6pt" fo:padding-bottom="3.6pt" fo:padding-left="7.2pt" fo:padding-right="7.2pt" fo:background-color="transparent"/>
    </style:style>
    <style:style style:family="paragraph" style:name="P10">
      <style:paragraph-properties/>
      <style:text-properties/>
    </style:style>
    <style:style style:family="paragraph" style:name="P11">
      <style:paragraph-properties/>
      <style:text-properties/>
    </style:style>
    <style:style style:family="presentation" style:name="pr3">
      <style:graphic-properties draw:fill="none" draw:textarea-vertical-align="top" draw:auto-grow-height="false" draw:auto-grow-width="false" draw:stroke="none" style:wrap="run-through" fo:padding-top="3.6pt" fo:padding-bottom="3.6pt" fo:padding-left="7.2pt" fo:padding-right="7.2pt" fo:background-color="transparent"/>
    </style:style>
    <style:style style:family="paragraph" style:name="P12">
      <style:paragraph-properties/>
      <style:text-properties/>
    </style:style>
    <style:style style:family="paragraph" style:name="P13">
      <style:paragraph-properties/>
      <style:text-properties/>
    </style:style>
    <style:style style:family="presentation" style:name="pr4">
      <style:graphic-properties draw:fill="none" draw:textarea-vertical-align="top" draw:auto-grow-height="false" draw:auto-grow-width="false" draw:stroke="none" style:wrap="run-through" fo:padding-top="3.6pt" fo:padding-bottom="3.6pt" fo:padding-left="7.2pt" fo:padding-right="7.2pt" fo:background-color="transparent"/>
    </style:style>
    <style:style style:family="paragraph" style:name="P14">
      <style:paragraph-properties/>
      <style:text-properties/>
    </style:style>
    <style:style style:family="paragraph" style:name="P15">
      <style:paragraph-properties/>
      <style:text-properties/>
    </style:style>
    <style:style style:family="drawing-page" style:name="dp4">
      <style:drawing-page-properties/>
    </style:style>
  </office:automatic-styles>
  <office:master-styles>
    <draw:layer-set>
      <draw:layer draw:name="layout"/>
      <draw:layer draw:name="background"/>
      <draw:layer draw:name="backgroundobjects"/>
      <draw:layer draw:name="controls"/>
      <draw:layer draw:name="measurelines"/>
    </draw:layer-set>
    <style:master-page style:name="__________________________Master1-Layout1-cust-Cover-Double-Images" style:page-layout-name="Mpm1" draw:style-name="dp3">
      <presentation:notes draw:style-name="dp4" style:page-layout-name="Mpm2"/>
      <draw:custom-shape xml:id="id1" draw:id="id1" draw:name="Rectangle 3" draw:style-name="gr2" svg:width="25.4cm" svg:height="2.086cm" svg:x="0cm" svg:y="-0.00377cm">
        <text:p text:style-name="P7"><text:span/></text:p>
        <draw:enhanced-geometry svg:viewBox="0 0 21600 21600" draw:type="ooxml-non-primitive" drawooo:sub-view-size="21600 21600" draw:text-areas="0 0 logwidth logheight" draw:enhanced-path="M 0 0 L 21600 0 21600 21600 0 21600 Z N "/>
      </draw:custom-shape>
      <draw:frame xml:id="id2" draw:id="id2" draw:name="Image 6" draw:style-name="gr3" svg:width="7.662cm" svg:height="12.56cm" svg:x="8.776cm" svg:y="0.01106cm">
        <draw:image xlink:href="Pictures/image1.png" xlink:type="simple" xlink:show="embed" xlink:actuate="onLoad"/>
      </draw:frame>
      <draw:frame xml:id="id3" draw:id="id3" draw:name="place_holder" draw:text-style-name="P8" draw:layer="backgroundobjects" presentation:style-name="pr1" presentation:class="outline" presentation:placeholder="false" presentation:user-transformed="true" svg:width="16.43cm" svg:height="12.54cm" svg:x="0cm" svg:y="0cm">
        <draw:text-box fo:min-height="12.54cm">
          <text:p text:style-name="P9"><text:span/></text:p>
        </draw:text-box>
      </draw:frame>
      <draw:frame xml:id="id4" draw:id="id4" draw:name="place_holder" draw:text-style-name="P10" draw:layer="backgroundobjects" presentation:style-name="pr2" presentation:class="outline" presentation:placeholder="false" presentation:user-transformed="true" svg:width="19.12cm" svg:height="12.57cm" svg:x="6.297cm" svg:y="-0.00377cm">
        <draw:text-box fo:min-height="12.57cm">
          <text:p text:style-name="P11"><text:span/></text:p>
        </draw:text-box>
      </draw:frame>
      <draw:frame xml:id="id5" draw:id="id5" draw:name="place_holder" draw:text-style-name="P12" draw:layer="backgroundobjects" presentation:style-name="pr3" presentation:class="outline" presentation:placeholder="false" presentation:user-transformed="true" svg:width="2.928cm" svg:height="0.7242cm" svg:x="21.6cm" svg:y="13.15cm">
        <draw:text-box fo:min-height="0.7242cm">
          <text:p text:style-name="P13"><text:span/></text:p>
        </draw:text-box>
      </draw:frame>
      <draw:frame xml:id="id6" draw:id="id6" draw:name="place_holder" draw:text-style-name="P14" draw:layer="backgroundobjects" presentation:style-name="pr4" presentation:class="outline" presentation:placeholder="false" presentation:user-transformed="true" svg:width="9.819cm" svg:height="0.9105cm" svg:x="0.8704cm" svg:y="13.06cm">
        <draw:text-box fo:min-height="0.9105cm">
          <text:p text:style-name="P15"><text:span/></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3.1.8</meta:generator>
  </office:meta>
</office:document-meta>
</file>